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Text_20_body">
      <style:text-properties officeooo:paragraph-rsid="00196c7f"/>
    </style:style>
    <style:style style:name="T1" style:family="text">
      <style:text-properties officeooo:rsid="00196c7f"/>
    </style:style>
    <style:style style:name="T2" style:family="text">
      <style:text-properties fo:font-weight="normal" officeooo:rsid="00196c7f" style:font-weight-asian="normal" style:font-weight-complex="normal"/>
    </style:style>
    <style:style style:name="T3"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2">Jonah Lomu Otieno</text:span></text:span><text:line-break/>P.O. Box <text:span text:style-name="T1">Private Bag Maseno,</text:span><text:line-break/><text:span text:style-name="T1">Kisumu</text:span>, Kenya<text:line-break/>Phone: 07<text:span text:style-name="T1">90790406</text:span><text:line-break/>Email: <text:span text:style-name="T1">lomuotieno@gmail.com</text:span></text:p>
      <text:p text:style-name="Text_20_body">23rd February 2026</text:p>
      <text:p text:style-name="Text_20_body">The Human Resource Manager<text:line-break/>Fortis Medical Training College</text:p>
      <text:p text:style-name="Text_20_body"><text:span text:style-name="Strong_20_Emphasis"><text:span text:style-name="T3">RE: APPLICATION FOR THE POSITION OF ICT TECHNICIAN/TRAINER</text:span></text:span></text:p>
      <text:p text:style-name="Text_20_body">Dear Sir/Madam,</text:p>
      <text:p text:style-name="Text_20_body">I am writing to express my interest in the position of ICT Technician/Trainer as advertised. With a background in Information Technology and hands-on experience in technical support, system maintenance and user training, I am confident in my ability to contribute effectively to your institution’s ICT department.</text:p>
      <text:p text:style-name="Text_20_body">Over time, I have developed strong skills in installing, configuring, and troubleshooting computer hardware and software systems. I am experienced in maintaining networks, resolving connectivity issues, and providing timely technical support to users. My approach to ICT support focuses not only on solving problems but also on ensuring users understand systems better to minimize recurring issues.</text:p>
      <text:p text:style-name="Text_20_body">I am highly organized and capable of managing ICT resources responsibly. I work well both independently and as part of a team, and I am always eager to learn and adapt to new technologies that improve institutional efficiency.</text:p>
      <text:p text:style-name="Text_20_body">I am excited about the opportunity to support and enhance the ICT infrastructure at Fortis Medical Training College while contributing to quality training delivery. I would welcome the opportunity to discuss how my skills and experience align with your institution’s goals.</text:p>
      <text:p text:style-name="Text_20_body">Thank you for considering my application. I look forward to your positive response.</text:p>
      <text:p text:style-name="Text_20_body">Yours faithfully,</text:p>
      <text:p text:style-name="P1"><text:span text:style-name="Strong_20_Emphasis"><text:span text:style-name="T2">Jonah Lomu Otieno</text:span></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3T21:21:53.569695261</meta:creation-date>
    <dc:date>2026-02-23T21:31:23.610819523</dc:date>
    <meta:editing-duration>PT9M34S</meta:editing-duration>
    <meta:editing-cycles>2</meta:editing-cycles>
    <meta:generator>LibreOffice/24.2.7.2$Linux_X86_64 LibreOffice_project/420$Build-2</meta:generator>
    <meta:document-statistic meta:table-count="0" meta:image-count="0" meta:object-count="0" meta:page-count="1" meta:paragraph-count="12" meta:word-count="234" meta:character-count="1582" meta:non-whitespace-character-count="1360"/>
  </office:meta>
</office:document-meta>
</file>