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color="#729fcf" loext:opacity="100%" fo:font-size="16pt" style:text-underline-style="solid" style:text-underline-width="auto" style:text-underline-color="font-color" fo:font-weight="bold" officeooo:rsid="00408440" officeooo:paragraph-rsid="004084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729fcf" loext:opacity="100%" fo:font-size="18pt" fo:font-weight="bold" officeooo:rsid="001754fc" officeooo:paragraph-rsid="001754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color="#000000" loext:opacity="100%" fo:font-size="12pt" style:text-underline-style="none" fo:font-weight="normal" officeooo:rsid="0021a7e3" officeooo:paragraph-rsid="0021a7e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fo:font-size="12pt" style:text-underline-style="none" fo:font-weight="normal" officeooo:rsid="003ad454" officeooo:paragraph-rsid="003ad45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paragraph-rsid="00285a2f"/>
    </style:style>
    <style:style style:name="P6" style:family="paragraph" style:parent-style-name="Standard">
      <style:paragraph-properties fo:text-align="end" style:justify-single-word="false"/>
      <style:text-properties officeooo:rsid="001754fc" officeooo:paragraph-rsid="001754fc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style:text-underline-style="solid" style:text-underline-width="auto" style:text-underline-color="font-color" officeooo:rsid="00193d0c" officeooo:paragraph-rsid="00193d0c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43c0f9"/>
    </style:style>
    <style:style style:name="P9" style:family="paragraph" style:parent-style-name="Standard">
      <style:paragraph-properties fo:line-height="150%" fo:text-align="start" style:justify-single-word="false"/>
      <style:text-properties fo:font-weight="bold" officeooo:paragraph-rsid="0043c0f9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rsid="003ed0f8" officeooo:paragraph-rsid="003ed0f8"/>
    </style:style>
    <style:style style:name="P11" style:family="paragraph" style:parent-style-name="Standard">
      <style:paragraph-properties fo:line-height="150%" fo:text-align="start" style:justify-single-word="false"/>
      <style:text-properties fo:color="#729fcf" loext:opacity="100%" fo:font-size="16pt" style:text-underline-style="solid" style:text-underline-width="auto" style:text-underline-color="font-color" fo:font-weight="bold" officeooo:rsid="00193d0c" officeooo:paragraph-rsid="00193d0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729fcf" loext:opacity="100%" style:font-name="Times New Roman1" fo:font-size="16pt" fo:letter-spacing="normal" fo:font-style="normal" style:text-underline-style="solid" style:text-underline-width="auto" style:text-underline-color="font-color" fo:font-weight="bold" officeooo:rsid="003871c8" officeooo:paragraph-rsid="003871c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fo:color="#729fcf" loext:opacity="100%" style:font-name="Times New Roman1" fo:font-size="16pt" fo:letter-spacing="normal" fo:font-style="normal" style:text-underline-style="solid" style:text-underline-width="auto" style:text-underline-color="font-color" fo:font-weight="bold" officeooo:rsid="003e0368" officeooo:paragraph-rsid="003e036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729fcf" loext:opacity="100%" style:font-name="Times New Roman1" fo:font-size="16pt" fo:letter-spacing="normal" fo:font-style="italic" style:text-underline-style="solid" style:text-underline-width="auto" style:text-underline-color="font-color" fo:font-weight="bold" officeooo:rsid="0050d228" officeooo:paragraph-rsid="0050d228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fo:color="#729fcf" loext:opacity="100%" style:font-name="Times New Roman1" fo:font-size="16pt" fo:letter-spacing="normal" fo:font-style="italic" style:text-underline-style="solid" style:text-underline-width="auto" style:text-underline-color="font-color" fo:font-weight="bold" officeooo:rsid="0059874e" officeooo:paragraph-rsid="0059874e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39e708" officeooo:paragraph-rsid="0039e708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3ad454" officeooo:paragraph-rsid="003ad454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8c28a" officeooo:paragraph-rsid="0048c28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normal" style:text-underline-style="none" fo:font-weight="bold" officeooo:rsid="0048c28a" officeooo:paragraph-rsid="0048c28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italic" style:text-underline-style="none" fo:font-weight="bold" officeooo:rsid="004e3035" officeooo:paragraph-rsid="004e3035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4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italic" style:text-underline-style="none" fo:font-weight="bold" officeooo:rsid="004f0a7b" officeooo:paragraph-rsid="004f6f6f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 style:list-style-name="L4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italic" style:text-underline-style="none" fo:font-weight="bold" officeooo:rsid="004f6f6f" officeooo:paragraph-rsid="004f6f6f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italic" style:text-underline-style="none" fo:font-weight="bold" officeooo:rsid="004f6f6f" officeooo:paragraph-rsid="004f6f6f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italic" style:text-underline-style="none" fo:font-weight="normal" officeooo:rsid="005221fa" officeooo:paragraph-rsid="005221fa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8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italic" style:text-underline-style="none" fo:font-weight="normal" officeooo:rsid="0059874e" officeooo:paragraph-rsid="0059874e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3">
      <style:paragraph-properties fo:line-height="150%" fo:text-align="start" style:justify-single-word="false"/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e3035" officeooo:paragraph-rsid="004e3035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color="#000000" loext:opacity="100%" fo:font-size="12pt" style:text-underline-style="none" fo:font-weight="normal" officeooo:rsid="0039e708" officeooo:paragraph-rsid="0039e708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line-height="150%" fo:text-align="start" style:justify-single-word="false"/>
      <style:text-properties fo:font-size="12pt" officeooo:paragraph-rsid="005221fa" style:font-size-asian="12pt" style:font-size-complex="12pt"/>
    </style:style>
    <style:style style:name="P29" style:family="paragraph" style:parent-style-name="Standard" style:list-style-name="L6">
      <style:paragraph-properties fo:line-height="150%" fo:text-align="start" style:justify-single-word="false"/>
      <style:text-properties fo:font-size="12pt" officeooo:paragraph-rsid="005221fa" style:font-size-asian="12pt" style:font-size-complex="12pt"/>
    </style:style>
    <style:style style:name="P30" style:family="paragraph" style:parent-style-name="Standard" style:list-style-name="L7">
      <style:paragraph-properties fo:line-height="150%" fo:text-align="start" style:justify-single-word="false"/>
      <style:text-properties fo:font-size="12pt" officeooo:paragraph-rsid="005221f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officeooo:rsid="00285a2f" style:font-size-asian="10.5pt" style:font-weight-asian="normal" style:font-size-complex="12pt" style:font-weight-complex="normal"/>
    </style:style>
    <style:style style:name="T3" style:family="text">
      <style:text-properties officeooo:rsid="00239014"/>
    </style:style>
    <style:style style:name="T4" style:family="text">
      <style:text-properties officeooo:rsid="0024dc0f"/>
    </style:style>
    <style:style style:name="T5" style:family="text">
      <style:text-properties officeooo:rsid="00250d00"/>
    </style:style>
    <style:style style:name="T6" style:family="text">
      <style:text-properties officeooo:rsid="00285a2f"/>
    </style:style>
    <style:style style:name="T7" style:family="text">
      <style:text-properties fo:font-variant="normal" fo:text-transform="none" style:font-name="Times New Roman1" fo:letter-spacing="normal" fo:font-style="normal"/>
    </style:style>
    <style:style style:name="T8" style:family="text">
      <style:text-properties fo:font-variant="normal" fo:text-transform="none" style:font-name="Times New Roman1" fo:letter-spacing="normal" fo:font-style="normal" officeooo:rsid="003e0368"/>
    </style:style>
    <style:style style:name="T9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3c0f9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style:font-size-asian="10.5pt" style:font-size-complex="12pt"/>
    </style:style>
    <style:style style:name="T1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style:font-size-asian="10.5pt" style:font-size-complex="12pt"/>
    </style:style>
    <style:style style:name="T1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officeooo:rsid="0041c841" style:font-size-asian="10.5pt" style:font-size-complex="12pt"/>
    </style:style>
    <style:style style:name="T13" style:family="text">
      <style:text-properties fo:font-variant="normal" fo:text-transform="none" fo:color="#000000" loext:opacity="100%" style:font-name="Times New Roman1" fo:font-size="16pt" fo:letter-spacing="normal" fo:font-style="normal" style:text-underline-style="none" fo:font-weight="normal" officeooo:rsid="005221fa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5221fa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729fcf" loext:opacity="100%" fo:font-weight="bold" officeooo:rsid="001754fc" style:font-weight-asian="bold" style:font-weight-complex="bold"/>
    </style:style>
    <style:style style:name="T17" style:family="text">
      <style:text-properties fo:color="#729fcf" loext:opacity="100%" fo:font-size="16pt" fo:font-style="normal" style:text-underline-style="solid" style:text-underline-width="auto" style:text-underline-color="font-color" officeooo:rsid="004f0a7b" style:font-size-asian="16pt" style:font-style-asian="normal" style:font-size-complex="16pt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0d22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e80c" style:font-style-asian="normal" style:font-weight-asian="normal" style:font-style-complex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nah Lomu Otieno|Computer Scientist</text:p>
      <text:p text:style-name="P6">location: <text:span text:style-name="T1">Kisumu, Kenya</text:span></text:p>
      <text:p text:style-name="P6">Telephone: <text:span text:style-name="T1">+254 790 790 406</text:span></text:p>
      <text:p text:style-name="P6">Email: <text:a xlink:type="simple" xlink:href="mailto:lomuotieno@gmail.com" text:style-name="Internet_20_link" text:visited-style-name="Visited_20_Internet_20_Link"><text:span text:style-name="T1">lomuotieno@gmail.com</text:span></text:a></text:p>
      <text:p text:style-name="P10"><text:span text:style-name="T15">GitHub</text:span><text:span text:style-name="T1">:https://github.com/Lomu-otieno</text:span></text:p>
      <text:p text:style-name="P7"><text:span text:style-name="T16"/></text:p>
      <text:p text:style-name="P11">Professional Profile <text:s text:c="86"/></text:p>
      <text:p text:style-name="P3">During my degree, <text:span text:style-name="T3">I did a three-month internship at County Government </text:span><text:span text:style-name="T6">o</text:span><text:span text:style-name="T3">f Kisumu in addition </text:span><text:span text:style-name="T5">to</text:span><text:span text:style-name="T3"> </text:span><text:span text:style-name="T4">working on </text:span><text:span text:style-name="T3">multiple personal project</text:span><text:span text:style-name="T4">s</text:span><text:span text:style-name="T3">. This has given me the knowledge of software development and organization leadership hierarchy, working both in teams, solo as well as the desire to learn more about the field.</text:span></text:p>
      <text:p text:style-name="P3"/>
      <text:p text:style-name="P5"><text:span text:style-name="T2">Having worked mostly for smaller firms, my short-term goal is to work in an javaScript language environment, with a vision to </text:span><text:span text:style-name="T7">not only write high-quality code but also to master industry best practices.</text:span></text:p>
      <text:p text:style-name="P5"><text:span text:style-name="T7"/></text:p>
      <text:p text:style-name="P12">Core Skills <text:s text:c="100"/></text:p>
      <text:section text:style-name="Sect1" text:name="Section1">
        <text:list text:style-name="L1">
          <text:list-item>
            <text:p text:style-name="P16">Web Application Development</text:p>
          </text:list-item>
          <text:list-item>
            <text:p text:style-name="P16">Front-end Development</text:p>
          </text:list-item>
          <text:list-item>
            <text:p text:style-name="P16">Back-end Development</text:p>
          </text:list-item>
          <text:list-item>
            <text:p text:style-name="P27"><text:span text:style-name="T7">No</text:span><text:span text:style-name="T8">SQL</text:span><text:span text:style-name="T7"> Database Management</text:span></text:p>
          </text:list-item>
          <text:list-item>
            <text:p text:style-name="P27"><text:span text:style-name="T8">SQL</text:span><text:span text:style-name="T7"> Database Management</text:span></text:p>
          </text:list-item>
          <text:list-item>
            <text:p text:style-name="P17">Data Structure and algorithms</text:p>
          </text:list-item>
        </text:list>
      </text:section>
      <text:p text:style-name="P4"><text:span text:style-name="T7"/></text:p>
      <text:p text:style-name="P13">Career Summary <text:s text:c="89"/></text:p>
      <text:p text:style-name="P1"><text:span text:style-name="T11">May 2025 to August 2025<text:tab/><text:tab/><text:tab/></text:span><text:span text:style-name="T12">County Government of Kisumu, </text:span><text:span text:style-name="T11">Intern </text:span></text:p>
      <text:p text:style-name="P8"><text:span text:style-name="T9">Acting as the IT support for the department of Agriculture and Fisheries, managing different offices setups and networks. </text:span><text:span text:style-name="T10">The role required me to develop a high degree of </text:span><text:span text:style-name="Strong_20_Emphasis"><text:span text:style-name="T10">self-sufficiency</text:span></text:span><text:span text:style-name="T10">. I learned to manage my own priorities and execute tasks with minimal supervision, which significantly built my confidence and independence.</text:span></text:p>
      <text:p text:style-name="P9"><text:span text:style-name="T11"/></text:p>
      <text:p text:style-name="P19">Key Responsibilities</text:p>
      <text:list text:style-name="L2">
        <text:list-item>
          <text:p text:style-name="P18">IT support</text:p>
        </text:list-item>
        <text:list-item>
          <text:p text:style-name="P18">Network Troubleshooting</text:p>
        </text:list-item>
        <text:list-item>
          <text:p text:style-name="P18">Software Installation</text:p>
        </text:list-item>
        <text:list-item>
          <text:p text:style-name="P18">Hardware Management and Configuration</text:p>
        </text:list-item>
      </text:list>
      <text:p text:style-name="P20"/>
      <text:p text:style-name="P20"/>
      <text:p text:style-name="P20"><text:soft-page-break/>Achievements</text:p>
      <text:list text:style-name="L3">
        <text:list-item>
          <text:p text:style-name="P26">Resolved an average of 5+ daily IT support tickets for software, hardware, and network issues, minimizing departmental downtime and ensuring continuous workflow for staff.</text:p>
          <text:p text:style-name="P26"/>
        </text:list-item>
        <text:list-item>
          <text:p text:style-name="P26">Managed and maintained network setups across multiple offices, reducing recurring connectivity issues through systematic troubleshooting.</text:p>
        </text:list-item>
      </text:list>
      <text:p text:style-name="P20"><text:line-break/><text:span text:style-name="T17">Education and Qualifications <text:s text:c="69"/></text:span></text:p>
      <text:list text:style-name="L4">
        <text:list-item>
          <text:p text:style-name="P21"><text:span text:style-name="T19">University of Maseno, 2022 to 2025, B</text:span><text:span text:style-name="T21">S</text:span><text:span text:style-name="T19">c Computer Science</text:span></text:p>
          <text:list>
            <text:list-header>
              <text:p text:style-name="P21"><text:span text:style-name="T19">Module Studied: </text:span></text:p>
            </text:list-header>
          </text:list>
        </text:list-item>
      </text:list>
      <text:section text:style-name="Sect1" text:name="Section2">
        <text:list text:continue-numbering="true" text:style-name="L4">
          <text:list-item>
            <text:list>
              <text:list-item>
                <text:list>
                  <text:list-item>
                    <text:p text:style-name="P21"><text:span text:style-name="T19">Database Management</text:span></text:p>
                  </text:list-item>
                  <text:list-item>
                    <text:p text:style-name="P21"><text:span text:style-name="T19">Machine Learning</text:span></text:p>
                  </text:list-item>
                  <text:list-item>
                    <text:p text:style-name="P21"><text:span text:style-name="T19">Java</text:span></text:p>
                  </text:list-item>
                  <text:list-item>
                    <text:p text:style-name="P21"><text:span text:style-name="T19">Pascal</text:span></text:p>
                  </text:list-item>
                  <text:list-item>
                    <text:p text:style-name="P21"><text:span text:style-name="T19">C</text:span></text:p>
                  </text:list-item>
                  <text:list-item>
                    <text:p text:style-name="P21"><text:span text:style-name="T19">C++</text:span></text:p>
                  </text:list-item>
                  <text:list-item>
                    <text:p text:style-name="P21"><text:span text:style-name="T19">Web Application Development</text:span></text:p>
                  </text:list-item>
                  <text:list-item>
                    <text:p text:style-name="P21"><text:span text:style-name="T19">Graphic Design</text:span></text:p>
                  </text:list-item>
                </text:list>
              </text:list-item>
            </text:list>
          </text:list-item>
        </text:list>
      </text:section>
      <text:list text:continue-numbering="true" text:style-name="L4">
        <text:list-item>
          <text:p text:style-name="P22"><text:span text:style-name="T19">A-level </text:span><text:span text:style-name="T20">Nyang'ori Boys High School, 2018 to 2022 </text:span><text:span text:style-name="T19">:</text:span></text:p>
        </text:list-item>
      </text:list>
      <text:section text:style-name="Sect1" text:name="Section3">
        <text:list text:continue-numbering="true" text:style-name="L4">
          <text:list-item>
            <text:list>
              <text:list-item>
                <text:p text:style-name="P22"><text:span text:style-name="T19">Geography</text:span></text:p>
              </text:list-item>
              <text:list-item>
                <text:p text:style-name="P22"><text:span text:style-name="T19">Biology</text:span></text:p>
              </text:list-item>
            </text:list>
          </text:list-item>
        </text:list>
        <text:p text:style-name="P23"><text:span text:style-name="T19"/></text:p>
        <text:list text:continue-numbering="true" text:style-name="L4">
          <text:list-item>
            <text:list>
              <text:list-item>
                <text:p text:style-name="P22"><text:span text:style-name="T19">English</text:span></text:p>
              </text:list-item>
              <text:list-item>
                <text:p text:style-name="P22"><text:span text:style-name="T19">Physics</text:span></text:p>
              </text:list-item>
            </text:list>
          </text:list-item>
        </text:list>
        <text:p text:style-name="P23"><text:span text:style-name="T19"/></text:p>
      </text:section>
      <text:p text:style-name="P23"><text:span text:style-name="T19"><text:tab/></text:span></text:p>
      <text:p text:style-name="P14"><text:span text:style-name="T18">References <text:s text:c="100"/></text:span></text:p>
      <text:section text:style-name="Sect1" text:name="Section4">
        <text:list text:style-name="L5">
          <text:list-item>
            <text:p text:style-name="P28"><text:span text:style-name="T14">Mrs. Jane <text:s/>Otieno</text:span></text:p>
          </text:list-item>
        </text:list>
        <text:p text:style-name="P24"><text:span text:style-name="T18"><text:tab/>Tel: +254 720 074 070</text:span></text:p>
        <text:list text:style-name="L6">
          <text:list-item>
            <text:p text:style-name="P29"><text:span text:style-name="T14">Mr. Thomas Shimekha<text:line-break/>Tel +254 723 678 661</text:span></text:p>
          </text:list-item>
        </text:list>
        <text:list text:style-name="L7">
          <text:list-item>
            <text:p text:style-name="P30"><text:span text:style-name="T14">Miss Audrine Perpetua</text:span></text:p>
          </text:list-item>
        </text:list>
        <text:p text:style-name="P24"><text:span text:style-name="T18"><text:tab/>Tel +254 790 691 150</text:span></text:p>
      </text:section>
      <text:p text:style-name="P15"><text:span text:style-name="T18">Hobbies and Interests <text:s text:c="82"/></text:span></text:p>
      <text:list text:style-name="L8">
        <text:list-item>
          <text:p text:style-name="P25"><text:span text:style-name="T18">Hitting the Gym</text:span></text:p>
        </text:list-item>
        <text:list-item>
          <text:p text:style-name="P25"><text:span text:style-name="T18">Personal coding projects</text:span></text:p>
        </text:list-item>
        <text:list-item>
          <text:p text:style-name="P25"><text:span text:style-name="T18">Language spoken English (fluent), Spanish (basic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90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2:01:22.800626828</meta:creation-date>
    <dc:date>2025-12-01T16:05:50.593186383</dc:date>
    <meta:editing-duration>PT8H40M37S</meta:editing-duration>
    <meta:editing-cycles>30</meta:editing-cycles>
    <meta:generator>LibreOffice/24.2.7.2$Linux_X86_64 LibreOffice_project/420$Build-2</meta:generator>
    <meta:document-statistic meta:table-count="0" meta:image-count="0" meta:object-count="0" meta:page-count="2" meta:paragraph-count="54" meta:word-count="346" meta:character-count="2750" meta:non-whitespace-character-count="1949"/>
  </office:meta>
</office:document-meta>
</file>