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cda2" officeooo:paragraph-rsid="0018cda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8cda2" officeooo:paragraph-rsid="0018cda2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8cda2" officeooo:paragraph-rsid="0019ffc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8cda2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8cda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cda2" officeooo:paragraph-rsid="0018cd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8cda2" officeooo:paragraph-rsid="0018cda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cda2" officeooo:paragraph-rsid="0019ffc9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officeooo:rsid="0018cda2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8cda2" style:font-size-asian="12pt" style:font-size-complex="12pt"/>
    </style:style>
    <style:style style:name="T5" style:family="text">
      <style:text-properties fo:font-size="16pt" fo:font-weight="normal" officeooo:rsid="0018cda2" style:font-size-asian="16pt" style:font-weight-asian="normal" style:font-size-complex="16pt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4</text:p>
      <text:p text:style-name="P1">SYSTEM CODE GENERATION AND TESTING</text:p>
      <text:p text:style-name="P2"/>
      <text:p text:style-name="P7">SYSTEM CODE GENERATION</text:p>
      <text:p text:style-name="P2"/>
      <text:p text:style-name="P4"><text:span text:style-name="T5">TESTING</text:span></text:p>
      <text:p text:style-name="P5"><text:span text:style-name="T3">Gui Testing<text:line-break/>Usability testing<text:line-break/>Performance testing <text:line-break/>White box testing<text:line-break/>Load testing<text:line-break/>Regression Testing</text:span></text:p>
      <text:p text:style-name="P5"><text:span text:style-name="T3">Stress testing</text:span></text:p>
      <text:p text:style-name="P5"><text:span text:style-name="T3">Smoke testing:</text:span></text:p>
      <text:p text:style-name="P5"><text:span text:style-name="T3">Unit Testing</text:span></text:p>
      <text:p text:style-name="P5"><text:span text:style-name="T3">Acceptance Testing<text:line-break/></text:span><text:span text:style-name="T4">Black box testing</text:span></text:p>
      <text:p text:style-name="P6"><text:span text:style-name="T3">Functional Testing</text:span></text:p>
      <text:p text:style-name="P6"><text:span text:style-name="T3">Integration Testing</text:span></text:p>
      <text:p text:style-name="P6"><text:span text:style-name="T3">Security Testing<text:line-break/>Portability/Compatibility Testing</text:span></text:p>
      <text:p text:style-name="P2"/>
      <text:p text:style-name="P8">CONCLUSIONS</text:p>
      <text:p text:style-name="P8"/>
      <text:p text:style-name="P8">RECOMMENDATION</text:p>
      <text:p text:style-name="P3"><text:span text:style-name="T6">CHAPTER 5</text:span></text:p>
      <text:p text:style-name="P1">CONCLUSIONS AND RECOMMENDATIONS</text:p>
      <text:p text:style-name="P1"/>
      <text:p text:style-name="P7">REFERENCES</text:p>
      <text:p text:style-name="P7"/>
      <text:p text:style-name="P7">APPENDIC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21:22:30.749144820</meta:creation-date>
    <dc:date>2026-03-24T21:36:14.259992441</dc:date>
    <meta:editing-duration>PT2M53S</meta:editing-duration>
    <meta:editing-cycles>1</meta:editing-cycles>
    <meta:document-statistic meta:table-count="0" meta:image-count="0" meta:object-count="0" meta:page-count="1" meta:paragraph-count="18" meta:word-count="52" meta:character-count="420" meta:non-whitespace-character-count="385"/>
    <meta:generator>LibreOffice/24.2.7.2$Linux_X86_64 LibreOffice_project/420$Build-2</meta:generator>
  </office:meta>
</office:document-meta>
</file>