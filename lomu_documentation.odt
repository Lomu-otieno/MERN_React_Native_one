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0000004004A432D7E.png" manifest:media-type="image/png"/>
  <manifest:file-entry manifest:full-path="Pictures/100000000000040000000600F9AA1698.png" manifest:media-type="image/png"/>
  <manifest:file-entry manifest:full-path="Pictures/10000000000006400000047FEB7342F5.jpg" manifest:media-type="image/jpeg"/>
  <manifest:file-entry manifest:full-path="Pictures/10000000000000E1000000E1E6981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Arial" svg:font-family="'Times New Roman/Arial'"/>
    <style:font-face style:name="Times New Roman1" svg:font-family="'Times New Roman'" style:font-adornments="Bold" style:font-family-generic="roman"/>
  </office:font-face-decls>
  <office:automatic-styles>
    <style:style style:name="P1" style:family="paragraph" style:parent-style-name="Text_20_body">
      <style:paragraph-properties fo:margin-left="0in" fo:margin-right="0in" fo:margin-top="0in" fo:margin-bottom="0in" style:contextual-spacing="true" fo:line-height="150%" fo:orphans="2" fo:widows="2" style:register-true="true" fo:text-indent="0in" style:auto-text-indent="false"/>
    </style:style>
    <style:style style:name="P2" style:family="paragraph" style:parent-style-name="Text_20_body">
      <style:paragraph-properties fo:margin-left="0in" fo:margin-right="0in" fo:margin-top="0.1665in" fo:margin-bottom="0in" style:contextual-spacing="false" fo:line-height="150%" fo:orphans="2" fo:widows="2" style:register-true="true" fo:text-indent="0in" style:auto-text-indent="false"/>
    </style:style>
    <style:style style:name="P3" style:family="paragraph" style:parent-style-name="Heading_20_4">
      <style:paragraph-properties fo:margin-left="0in" fo:margin-right="0in" fo:margin-top="0.1665in" fo:margin-bottom="0.1665in" style:contextual-spacing="false" fo:line-height="150%" fo:orphans="2" fo:widows="2" style:register-true="true" fo:text-indent="0in" style:auto-text-indent="false"/>
    </style:style>
    <style:style style:name="P4"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style>
    <style:style style:name="P5" style:family="paragraph" style:parent-style-name="Heading_20_4">
      <style:paragraph-properties fo:margin-left="0in" fo:margin-right="0in" fo:margin-top="0.1665in" fo:margin-bottom="0.0835in" style:contextual-spacing="false" fo:line-height="150%" fo:orphans="2" fo:widows="2" style:register-true="true" fo:text-indent="0in" style:auto-text-indent="false"/>
    </style:style>
    <style:style style:name="P6" style:family="paragraph" style:parent-style-name="Text_20_body">
      <style:paragraph-properties fo:margin-left="0in" fo:margin-right="0in" fo:margin-top="0in" fo:margin-bottom="0in" style:contextual-spacing="false" fo:line-height="150%" fo:orphans="2" fo:widows="2" style:register-true="true" fo:text-indent="0in" style:auto-text-indent="false"/>
    </style:style>
    <style:style style:name="P7"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text-properties officeooo:paragraph-rsid="00464d4b"/>
    </style:style>
    <style:style style:name="P8"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paragraph-rsid="001cd297"/>
    </style:style>
    <style:style style:name="P9"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paragraph-rsid="0005b30b"/>
    </style:style>
    <style:style style:name="P10" style:family="paragraph" style:parent-style-name="Standard">
      <style:paragraph-properties fo:margin-right="0in" fo:line-height="150%" fo:text-align="justify" style:justify-single-word="false" style:register-true="true" fo:text-indent="0in" style:auto-text-indent="false" fo:break-before="page">
        <style:tab-stops/>
      </style:paragraph-properties>
      <style:text-properties officeooo:paragraph-rsid="000e5c1e"/>
    </style:style>
    <style:style style:name="P11"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paragraph-rsid="00101bca"/>
    </style:style>
    <style:style style:name="P12"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paragraph-rsid="00187d32"/>
    </style:style>
    <style:style style:name="P13" style:family="paragraph" style:parent-style-name="Text_20_body">
      <style:paragraph-properties fo:margin-right="0in" fo:line-height="150%" fo:text-align="justify" style:justify-single-word="false" style:register-true="true" fo:text-indent="0in" style:auto-text-indent="false">
        <style:tab-stops/>
      </style:paragraph-properties>
      <style:text-properties officeooo:paragraph-rsid="00187d32"/>
    </style:style>
    <style:style style:name="P14"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paragraph-rsid="001ad710"/>
    </style:style>
    <style:style style:name="P15" style:family="paragraph" style:parent-style-name="Standard">
      <style:paragraph-properties fo:margin-right="0in" fo:line-height="150%" fo:text-align="justify" style:justify-single-word="false" style:register-true="true" fo:text-indent="0in" style:auto-text-indent="false" fo:break-before="page">
        <style:tab-stops/>
      </style:paragraph-properties>
      <style:text-properties officeooo:paragraph-rsid="001ad710"/>
    </style:style>
    <style:style style:name="P16" style:family="paragraph" style:parent-style-name="Text_20_body">
      <style:paragraph-properties fo:margin-left="0in" fo:margin-right="0in" fo:margin-top="0.1665in" fo:margin-bottom="0.1665in" style:contextual-spacing="false" fo:line-height="150%" fo:text-align="justify" style:justify-single-word="false" fo:orphans="2" fo:widows="2" style:register-true="true" fo:text-indent="0in" style:auto-text-indent="false"/>
    </style:style>
    <style:style style:name="P17" style:family="paragraph" style:parent-style-name="Text_20_body">
      <style:paragraph-properties fo:margin-left="0in" fo:margin-right="0in" fo:margin-top="0.1665in" fo:margin-bottom="0in" style:contextual-spacing="false" fo:line-height="150%" fo:text-align="justify" style:justify-single-word="false" fo:orphans="2" fo:widows="2" style:register-true="true" fo:text-indent="0in" style:auto-text-indent="false"/>
    </style:style>
    <style:style style:name="P18" style:family="paragraph" style:parent-style-name="Text_20_body">
      <style:paragraph-properties fo:line-height="150%" fo:text-align="justify" style:justify-single-word="false" style:register-true="true"/>
    </style:style>
    <style:style style:name="P19" style:family="paragraph" style:parent-style-name="Standard">
      <style:paragraph-properties fo:margin-right="0in" fo:line-height="150%" fo:text-align="center" style:justify-single-word="false" style:register-true="true" fo:text-indent="0in" style:auto-text-indent="false">
        <style:tab-stops/>
      </style:paragraph-properties>
      <style:text-properties officeooo:paragraph-rsid="0005b30b"/>
    </style:style>
    <style:style style:name="P20" style:family="paragraph" style:parent-style-name="Text_20_body">
      <style:paragraph-properties fo:margin-left="0in" fo:margin-right="0in" fo:margin-top="0.1665in" fo:margin-bottom="0.1665in" style:contextual-spacing="false" fo:line-height="150%" style:register-true="true" fo:text-indent="0in" style:auto-text-indent="false"/>
    </style:style>
    <style:style style:name="P21" style:family="paragraph" style:parent-style-name="Text_20_body">
      <style:paragraph-properties fo:line-height="150%"/>
    </style:style>
    <style:style style:name="P22" style:family="paragraph" style:parent-style-name="Text_20_body">
      <style:paragraph-properties fo:margin-top="0in" fo:margin-bottom="0in" style:contextual-spacing="false" fo:line-height="150%"/>
      <style:text-properties officeooo:paragraph-rsid="007b6c04"/>
    </style:style>
    <style:style style:name="P23"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rsid="00013b6a" officeooo:paragraph-rsid="0005b30b"/>
    </style:style>
    <style:style style:name="P24" style:family="paragraph" style:parent-style-name="Standard" style:master-page-name="">
      <style:paragraph-properties fo:margin-right="0in" fo:line-height="150%" fo:text-align="justify" style:justify-single-word="false" style:register-true="true" fo:text-indent="0in" style:auto-text-indent="false" style:page-number="auto">
        <style:tab-stops/>
      </style:paragraph-properties>
      <style:text-properties officeooo:rsid="00013b6a" officeooo:paragraph-rsid="0005b30b"/>
    </style:style>
    <style:style style:name="P25" style:family="paragraph" style:parent-style-name="Standard">
      <style:paragraph-properties fo:margin-right="0in" fo:line-height="150%" fo:text-align="center" style:justify-single-word="false" style:register-true="true" fo:text-indent="0in" style:auto-text-indent="false">
        <style:tab-stops/>
      </style:paragraph-properties>
      <style:text-properties officeooo:rsid="00013b6a" officeooo:paragraph-rsid="0005b30b"/>
    </style:style>
    <style:style style:name="P26" style:family="paragraph" style:parent-style-name="Text_20_body">
      <style:paragraph-properties fo:line-height="150%" fo:text-align="justify" style:justify-single-word="false" style:register-true="true"/>
      <style:text-properties style:font-name="Times New Roman"/>
    </style:style>
    <style:style style:name="P27" style:family="paragraph" style:parent-style-name="Horizontal_20_Line">
      <style:paragraph-properties fo:line-height="150%"/>
      <style:text-properties style:font-name="Times New Roman"/>
    </style:style>
    <style:style style:name="P28" style:family="paragraph" style:parent-style-name="Preformatted_20_Text">
      <style:paragraph-properties fo:margin-left="0in" fo:margin-right="0in" fo:line-height="150%" fo:text-indent="0in" style:auto-text-indent="false"/>
      <style:text-properties style:font-name="Times New Roman" officeooo:paragraph-rsid="006aa63c"/>
    </style:style>
    <style:style style:name="P29" style:family="paragraph" style:parent-style-name="Preformatted_20_Text">
      <style:paragraph-properties fo:line-height="150%"/>
      <style:text-properties style:font-name="Times New Roman" officeooo:paragraph-rsid="006aa63c"/>
    </style:style>
    <style:style style:name="P30" style:family="paragraph" style:parent-style-name="Preformatted_20_Text">
      <style:paragraph-properties fo:line-height="150%"/>
      <style:text-properties officeooo:paragraph-rsid="006aa63c"/>
    </style:style>
    <style:style style:name="P31" style:family="paragraph" style:parent-style-name="Contents_20_1">
      <style:paragraph-properties>
        <style:tab-stops>
          <style:tab-stop style:position="5.7693in" style:type="right" style:leader-style="dotted" style:leader-text="."/>
        </style:tab-stops>
      </style:paragraph-properties>
    </style:style>
    <style:style style:name="P32" style:family="paragraph" style:parent-style-name="Contents_20_2">
      <style:paragraph-properties>
        <style:tab-stops>
          <style:tab-stop style:position="5.5728in" style:type="right" style:leader-style="dotted" style:leader-text="."/>
        </style:tab-stops>
      </style:paragraph-properties>
    </style:style>
    <style:style style:name="P33" style:family="paragraph" style:parent-style-name="Contents_20_3">
      <style:paragraph-properties>
        <style:tab-stops>
          <style:tab-stop style:position="5.3756in" style:type="right" style:leader-style="dotted" style:leader-text="."/>
        </style:tab-stops>
      </style:paragraph-properties>
    </style:style>
    <style:style style:name="P34" style:family="paragraph" style:parent-style-name="Contents_20_4">
      <style:paragraph-properties>
        <style:tab-stops>
          <style:tab-stop style:position="5.1791in" style:type="right" style:leader-style="dotted" style:leader-text="."/>
        </style:tab-stops>
      </style:paragraph-properties>
    </style:style>
    <style:style style:name="P35" style:family="paragraph" style:parent-style-name="Footer">
      <style:paragraph-properties fo:text-align="center" style:justify-single-word="false"/>
    </style:style>
    <style:style style:name="P36" style:family="paragraph" style:parent-style-name="Heading_20_1">
      <style:paragraph-properties fo:margin-left="0in" fo:margin-right="0in" fo:margin-top="0.1665in" fo:margin-bottom="0.1665in" style:contextual-spacing="false" fo:line-height="150%" fo:orphans="2" fo:widows="2" style:register-true="true" fo:text-indent="0in" style:auto-text-indent="false" fo:break-before="page"/>
      <style:text-properties officeooo:paragraph-rsid="006aa63c"/>
    </style:style>
    <style:style style:name="P37" style:family="paragraph" style:parent-style-name="Heading_20_1">
      <style:paragraph-properties fo:line-height="150%"/>
    </style:style>
    <style:style style:name="P38" style:family="paragraph" style:parent-style-name="Heading_20_2">
      <style:paragraph-properties fo:margin-top="0in" fo:margin-bottom="0in" style:contextual-spacing="false" fo:line-height="150%"/>
      <style:text-properties style:font-name="Times New Roman"/>
    </style:style>
    <style:style style:name="P39" style:family="paragraph" style:parent-style-name="Heading_20_2">
      <style:paragraph-properties fo:line-height="150%"/>
      <style:text-properties style:font-name="Times New Roman"/>
    </style:style>
    <style:style style:name="P40" style:family="paragraph" style:parent-style-name="Heading_20_2">
      <style:paragraph-properties fo:line-height="150%" fo:break-before="page"/>
      <style:text-properties style:font-name="Times New Roman"/>
    </style:style>
    <style:style style:name="P41" style:family="paragraph" style:parent-style-name="Heading_20_2">
      <style:paragraph-properties fo:line-height="150%"/>
    </style:style>
    <style:style style:name="P42" style:family="paragraph" style:parent-style-name="Heading_20_2">
      <style:paragraph-properties fo:line-height="150%"/>
      <style:text-properties officeooo:paragraph-rsid="007b6c04"/>
    </style:style>
    <style:style style:name="P43" style:family="paragraph" style:parent-style-name="Heading_20_2">
      <style:paragraph-properties fo:line-height="150%"/>
      <style:text-properties officeooo:paragraph-rsid="0083167a"/>
    </style:style>
    <style:style style:name="P44" style:family="paragraph" style:parent-style-name="Heading_20_2">
      <style:paragraph-properties fo:line-height="150%"/>
      <style:text-properties officeooo:paragraph-rsid="00898342"/>
    </style:style>
    <style:style style:name="P45" style:family="paragraph" style:parent-style-name="Heading_20_3">
      <style:paragraph-properties fo:margin-left="0in" fo:margin-right="0in" fo:margin-top="0in" fo:margin-bottom="0in" style:contextual-spacing="true" fo:line-height="150%" fo:orphans="2" fo:widows="2" style:register-true="true" fo:text-indent="0in" style:auto-text-indent="false"/>
    </style:style>
    <style:style style:name="P46" style:family="paragraph" style:parent-style-name="Heading_20_3">
      <style:paragraph-properties fo:line-height="150%"/>
    </style:style>
    <style:style style:name="P47" style:family="paragraph" style:parent-style-name="Heading_20_3">
      <style:paragraph-properties fo:line-height="150%"/>
      <style:text-properties officeooo:paragraph-rsid="007922e9"/>
    </style:style>
    <style:style style:name="P48" style:family="paragraph" style:parent-style-name="Heading_20_3">
      <style:paragraph-properties fo:line-height="150%"/>
      <style:text-properties officeooo:paragraph-rsid="0083167a"/>
    </style:style>
    <style:style style:name="P49" style:family="paragraph" style:parent-style-name="Heading_20_3">
      <style:paragraph-properties fo:line-height="150%"/>
      <style:text-properties style:font-name="Times New Roman" officeooo:paragraph-rsid="007b6c04"/>
    </style:style>
    <style:style style:name="P50" style:family="paragraph" style:parent-style-name="Standard">
      <style:paragraph-properties fo:margin-right="0in" fo:line-height="150%" fo:text-align="justify" style:justify-single-word="false" style:register-true="true" fo:text-indent="0in" style:auto-text-indent="false" fo:break-before="page">
        <style:tab-stops/>
      </style:paragraph-properties>
      <style:text-properties officeooo:paragraph-rsid="00187d32"/>
    </style:style>
    <style:style style:name="P51" style:family="paragraph" style:parent-style-name="Standard">
      <style:paragraph-properties fo:margin-right="0in" fo:line-height="150%" fo:text-align="justify" style:justify-single-word="false" style:register-true="true" fo:text-indent="0in" style:auto-text-indent="false">
        <style:tab-stops/>
      </style:paragraph-properties>
      <style:text-properties officeooo:paragraph-rsid="0090956f"/>
    </style:style>
    <style:style style:name="P52" style:family="paragraph" style:parent-style-name="Standard">
      <style:paragraph-properties fo:margin-right="0in" fo:line-height="150%" fo:text-align="justify" style:justify-single-word="false" style:register-true="true" fo:text-indent="0in" style:auto-text-indent="false" fo:break-before="page">
        <style:tab-stops/>
      </style:paragraph-properties>
      <style:text-properties officeooo:paragraph-rsid="0090956f"/>
    </style:style>
    <style:style style:name="P53" style:family="paragraph" style:parent-style-name="Standard">
      <style:paragraph-properties fo:margin-right="0in" fo:line-height="150%" fo:text-align="justify" style:justify-single-word="false" style:register-true="true" fo:text-indent="0in" style:auto-text-indent="false">
        <style:tab-stops/>
      </style:paragraph-properties>
      <style:text-properties style:font-name="Times New Roman" officeooo:paragraph-rsid="00187d32"/>
    </style:style>
    <style:style style:name="P54" style:family="paragraph" style:parent-style-name="Standard">
      <style:paragraph-properties fo:margin-right="0in" fo:line-height="150%" fo:text-align="justify" style:justify-single-word="false" style:register-true="true" fo:text-indent="0in" style:auto-text-indent="false">
        <style:tab-stops/>
      </style:paragraph-properties>
      <style:text-properties style:font-name="Times New Roman" officeooo:paragraph-rsid="0018cf8f"/>
    </style:style>
    <style:style style:name="P55" style:family="paragraph" style:parent-style-name="Text_20_body" style:list-style-name="L1">
      <style:paragraph-properties fo:margin-top="0.1665in" fo:margin-bottom="0.1665in" style:contextual-spacing="false" fo:line-height="150%" fo:text-align="justify" style:justify-single-word="false" fo:orphans="2" fo:widows="2" style:register-true="true"/>
      <style:text-properties officeooo:paragraph-rsid="0022c891"/>
    </style:style>
    <style:style style:name="P56" style:family="paragraph" style:parent-style-name="Text_20_body" style:list-style-name="L8">
      <style:paragraph-properties fo:margin-left="0in" fo:margin-right="0in" fo:margin-top="0in" fo:margin-bottom="0in" style:contextual-spacing="false" fo:line-height="150%" fo:orphans="2" fo:widows="2" style:register-true="true" fo:text-indent="0in" style:auto-text-indent="false" fo:padding="0in" fo:border="none"/>
    </style:style>
    <style:style style:name="P57" style:family="paragraph" style:parent-style-name="Text_20_body" style:list-style-name="L9">
      <style:paragraph-properties fo:margin-left="0in" fo:margin-right="0in" fo:margin-top="0in" fo:margin-bottom="0in" style:contextual-spacing="false" fo:line-height="150%" fo:orphans="2" fo:widows="2" style:register-true="true" fo:text-indent="0in" style:auto-text-indent="false" fo:padding="0in" fo:border="none"/>
    </style:style>
    <style:style style:name="P58" style:family="paragraph" style:parent-style-name="Text_20_body" style:list-style-name="L10">
      <style:paragraph-properties fo:margin-left="0in" fo:margin-right="0in" fo:margin-top="0in" fo:margin-bottom="0in" style:contextual-spacing="false" fo:line-height="150%" fo:orphans="2" fo:widows="2" style:register-true="true" fo:text-indent="0in" style:auto-text-indent="false" fo:padding="0in" fo:border="none"/>
      <style:text-properties officeooo:paragraph-rsid="0090956f"/>
    </style:style>
    <style:style style:name="P59" style:family="paragraph" style:parent-style-name="Text_20_body" style:list-style-name="L11">
      <style:paragraph-properties fo:margin-left="0in" fo:margin-right="0in" fo:margin-top="0in" fo:margin-bottom="0in" style:contextual-spacing="false" fo:line-height="150%" fo:orphans="2" fo:widows="2" style:register-true="true" fo:text-indent="0in" style:auto-text-indent="false" fo:padding="0in" fo:border="none"/>
      <style:text-properties officeooo:paragraph-rsid="003acd15"/>
    </style:style>
    <style:style style:name="P60" style:family="paragraph" style:parent-style-name="Text_20_body" style:list-style-name="L11">
      <style:paragraph-properties fo:margin-left="0in" fo:margin-right="0in" fo:margin-top="0in" fo:margin-bottom="0in" style:contextual-spacing="false" fo:line-height="150%" fo:orphans="2" fo:widows="2" style:register-true="true" fo:text-indent="0in" style:auto-text-indent="false" fo:padding="0in" fo:border="none"/>
    </style:style>
    <style:style style:name="P61" style:family="paragraph" style:parent-style-name="Text_20_body" style:list-style-name="L12">
      <style:paragraph-properties fo:margin-left="0in" fo:margin-right="0in" fo:margin-top="0in" fo:margin-bottom="0in" style:contextual-spacing="false" fo:line-height="150%" fo:orphans="2" fo:widows="2" style:register-true="true" fo:text-indent="0in" style:auto-text-indent="false" fo:padding="0in" fo:border="none"/>
    </style:style>
    <style:style style:name="P62" style:family="paragraph" style:parent-style-name="Text_20_body" style:list-style-name="L13">
      <style:paragraph-properties fo:margin-left="0in" fo:margin-right="0in" fo:margin-top="0in" fo:margin-bottom="0in" style:contextual-spacing="false" fo:line-height="150%" fo:orphans="2" fo:widows="2" style:register-true="true" fo:text-indent="0in" style:auto-text-indent="false" fo:padding="0in" fo:border="none"/>
    </style:style>
    <style:style style:name="P63" style:family="paragraph" style:parent-style-name="Text_20_body" style:list-style-name="L14">
      <style:paragraph-properties fo:margin-left="0in" fo:margin-right="0in" fo:margin-top="0in" fo:margin-bottom="0.0835in" style:contextual-spacing="false" fo:line-height="150%" fo:orphans="2" fo:widows="2" style:register-true="true" fo:text-indent="0in" style:auto-text-indent="false" fo:padding="0in" fo:border="none"/>
    </style:style>
    <style:style style:name="P64" style:family="paragraph" style:parent-style-name="Text_20_body" style:list-style-name="L14">
      <style:paragraph-properties fo:margin-left="0in" fo:margin-right="0in" fo:margin-top="0in" fo:margin-bottom="0in" style:contextual-spacing="false" fo:line-height="150%" fo:orphans="2" fo:widows="2" style:register-true="true" fo:text-indent="0in" style:auto-text-indent="false" fo:padding="0in" fo:border="none"/>
    </style:style>
    <style:style style:name="P65" style:family="paragraph" style:parent-style-name="Text_20_body" style:list-style-name="L15">
      <style:paragraph-properties fo:margin-left="0in" fo:margin-right="0in" fo:margin-top="0in" fo:margin-bottom="0in" style:contextual-spacing="false" fo:line-height="150%" fo:orphans="2" fo:widows="2" style:register-true="true" fo:text-indent="0in" style:auto-text-indent="false" fo:padding="0in" fo:border="none"/>
    </style:style>
    <style:style style:name="P66" style:family="paragraph" style:parent-style-name="Text_20_body" style:list-style-name="L15">
      <style:paragraph-properties fo:margin-left="0in" fo:margin-right="0in" fo:margin-top="0in" fo:margin-bottom="0.0835in" style:contextual-spacing="false" fo:line-height="150%" fo:orphans="2" fo:widows="2" style:register-true="true" fo:text-indent="0in" style:auto-text-indent="false" fo:padding="0in" fo:border="none"/>
    </style:style>
    <style:style style:name="P67" style:family="paragraph" style:parent-style-name="Text_20_body" style:list-style-name="L16">
      <style:paragraph-properties fo:margin-left="0in" fo:margin-right="0in" fo:margin-top="0in" fo:margin-bottom="0in" style:contextual-spacing="false" fo:line-height="150%" fo:orphans="2" fo:widows="2" style:register-true="true" fo:text-indent="0in" style:auto-text-indent="false" fo:padding="0in" fo:border="none"/>
    </style:style>
    <style:style style:name="P68" style:family="paragraph" style:parent-style-name="Text_20_body" style:list-style-name="L17">
      <style:paragraph-properties fo:margin-left="0in" fo:margin-right="0in" fo:margin-top="0in" fo:margin-bottom="0.0835in" style:contextual-spacing="false" fo:line-height="150%" fo:orphans="2" fo:widows="2" style:register-true="true" fo:text-indent="0in" style:auto-text-indent="false" fo:padding="0in" fo:border="none"/>
    </style:style>
    <style:style style:name="P69" style:family="paragraph" style:parent-style-name="Text_20_body" style:list-style-name="L17">
      <style:paragraph-properties fo:margin-left="0in" fo:margin-right="0in" fo:margin-top="0in" fo:margin-bottom="0in" style:contextual-spacing="false" fo:line-height="150%" fo:orphans="2" fo:widows="2" style:register-true="true" fo:text-indent="0in" style:auto-text-indent="false" fo:padding="0in" fo:border="none"/>
    </style:style>
    <style:style style:name="P70" style:family="paragraph" style:parent-style-name="Text_20_body" style:list-style-name="L18">
      <style:paragraph-properties fo:margin-left="0in" fo:margin-right="0in" fo:margin-top="0in" fo:margin-bottom="0in" style:contextual-spacing="false" fo:line-height="150%" fo:orphans="2" fo:widows="2" style:register-true="true" fo:text-indent="0in" style:auto-text-indent="false" fo:padding="0in" fo:border="none"/>
    </style:style>
    <style:style style:name="P71" style:family="paragraph" style:parent-style-name="Text_20_body" style:list-style-name="L20">
      <style:paragraph-properties fo:margin-left="0in" fo:margin-right="0in" fo:margin-top="0in" fo:margin-bottom="0in" style:contextual-spacing="false" fo:line-height="150%" fo:orphans="2" fo:widows="2" style:register-true="true" fo:text-indent="0in" style:auto-text-indent="false" fo:padding="0in" fo:border="none"/>
    </style:style>
    <style:style style:name="P72" style:family="paragraph" style:parent-style-name="Text_20_body" style:list-style-name="L21">
      <style:paragraph-properties fo:margin-left="0in" fo:margin-right="0in" fo:margin-top="0in" fo:margin-bottom="0.0835in" style:contextual-spacing="false" fo:line-height="150%" fo:orphans="2" fo:widows="2" style:register-true="true" fo:text-indent="0in" style:auto-text-indent="false" fo:padding="0in" fo:border="none"/>
    </style:style>
    <style:style style:name="P73" style:family="paragraph" style:parent-style-name="Text_20_body" style:list-style-name="L21">
      <style:paragraph-properties fo:margin-left="0in" fo:margin-right="0in" fo:margin-top="0in" fo:margin-bottom="0in" style:contextual-spacing="false" fo:line-height="150%" fo:orphans="2" fo:widows="2" style:register-true="true" fo:text-indent="0in" style:auto-text-indent="false" fo:padding="0in" fo:border="none"/>
    </style:style>
    <style:style style:name="P74" style:family="paragraph" style:parent-style-name="Text_20_body" style:list-style-name="L22">
      <style:paragraph-properties fo:margin-left="0in" fo:margin-right="0in" fo:margin-top="0in" fo:margin-bottom="0in" style:contextual-spacing="false" fo:line-height="150%" fo:orphans="2" fo:widows="2" style:register-true="true" fo:text-indent="0in" style:auto-text-indent="false" fo:padding="0in" fo:border="none"/>
    </style:style>
    <style:style style:name="P75" style:family="paragraph" style:parent-style-name="Text_20_body" style:list-style-name="L48">
      <style:paragraph-properties fo:margin-left="0in" fo:margin-right="0in" fo:margin-top="0.1665in" fo:margin-bottom="0.1665in" style:contextual-spacing="false" fo:line-height="150%" fo:orphans="2" fo:widows="2" style:register-true="true" fo:text-indent="0in" style:auto-text-indent="false"/>
      <style:text-properties officeooo:paragraph-rsid="006aa63c"/>
    </style:style>
    <style:style style:name="P76" style:family="paragraph" style:parent-style-name="Text_20_body" style:list-style-name="L48">
      <style:paragraph-properties fo:margin-left="0in" fo:margin-right="0in" fo:margin-top="0.1665in" fo:margin-bottom="0in" style:contextual-spacing="false" fo:line-height="150%" fo:orphans="2" fo:widows="2" style:register-true="true" fo:text-indent="0in" style:auto-text-indent="false"/>
      <style:text-properties officeooo:paragraph-rsid="006aa63c"/>
    </style:style>
    <style:style style:name="P77" style:family="paragraph" style:parent-style-name="Text_20_body">
      <style:paragraph-properties fo:margin-left="0in" fo:margin-right="0in" fo:margin-top="0in" fo:margin-bottom="0in" style:contextual-spacing="true" fo:line-height="150%" fo:orphans="2" fo:widows="2" style:register-true="true" fo:text-indent="0in" style:auto-text-indent="false"/>
      <style:text-properties officeooo:paragraph-rsid="0083167a"/>
    </style:style>
    <style:style style:name="P78" style:family="paragraph" style:parent-style-name="Text_20_body">
      <style:paragraph-properties fo:line-height="150%"/>
    </style:style>
    <style:style style:name="P79" style:family="paragraph" style:parent-style-name="Text_20_body" style:list-style-name="L23">
      <style:paragraph-properties fo:margin-top="0in" fo:margin-bottom="0in" style:contextual-spacing="false" fo:line-height="150%"/>
    </style:style>
    <style:style style:name="P80" style:family="paragraph" style:parent-style-name="Text_20_body" style:list-style-name="L23">
      <style:paragraph-properties fo:line-height="150%"/>
    </style:style>
    <style:style style:name="P81" style:family="paragraph" style:parent-style-name="Text_20_body" style:list-style-name="L48">
      <style:paragraph-properties fo:margin-top="0in" fo:margin-bottom="0in" style:contextual-spacing="false" fo:line-height="150%"/>
    </style:style>
    <style:style style:name="P82" style:family="paragraph" style:parent-style-name="Text_20_body" style:list-style-name="L48">
      <style:paragraph-properties fo:line-height="150%"/>
    </style:style>
    <style:style style:name="P83" style:family="paragraph" style:parent-style-name="Text_20_body">
      <style:paragraph-properties fo:margin-top="0in" fo:margin-bottom="0in" style:contextual-spacing="false" fo:line-height="150%"/>
    </style:style>
    <style:style style:name="P84" style:family="paragraph" style:parent-style-name="Text_20_body">
      <style:paragraph-properties fo:margin-left="0in" fo:margin-right="0in" fo:margin-top="0.048in" fo:margin-bottom="0.048in" style:contextual-spacing="false" fo:line-height="150%" fo:text-align="justify" style:justify-single-word="false"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style>
    <style:style style:name="P85" style:family="paragraph" style:parent-style-name="Text_20_body">
      <style:paragraph-properties fo:margin-left="0in" fo:margin-right="0in" fo:margin-top="0.1665in" fo:margin-bottom="0.1665in" style:contextual-spacing="false" fo:line-height="150%" fo:text-align="justify" style:justify-single-word="false"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86" style:family="paragraph" style:parent-style-name="Text_20_body">
      <style:paragraph-properties fo:margin-left="0in" fo:margin-right="0in" fo:margin-top="0.1665in" fo:margin-bottom="0in" style:contextual-spacing="false" fo:line-height="150%" fo:text-align="justify" style:justify-single-word="false"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87" style:family="paragraph" style:parent-style-name="Text_20_body" style:list-style-name="L2">
      <style:paragraph-properties fo:margin-left="0in" fo:margin-right="0in" fo:margin-top="0in" fo:margin-bottom="0in" style:contextual-spacing="false" fo:line-height="150%" fo:text-align="justify" style:justify-single-word="false" fo:orphans="2" fo:widows="2" style:register-true="true" fo:text-indent="0in" style:auto-text-indent="false" fo:padding="0in" fo:border="non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88" style:family="paragraph" style:parent-style-name="Text_20_body" style:list-style-name="L3">
      <style:paragraph-properties fo:margin-top="0.0874in" fo:margin-bottom="0.0874in" style:contextual-spacing="false" fo:line-height="150%" fo:text-align="justify" style:justify-single-word="false" fo:orphans="2" fo:widows="2" style:register-true="true"/>
      <style:text-properties fo:font-variant="normal" fo:text-transform="none" fo:color="#000000" loext:opacity="100%" style:font-name="Times New Roman" fo:font-size="12pt" fo:letter-spacing="normal" fo:font-style="normal" fo:font-weight="normal" officeooo:paragraph-rsid="0025e065" style:font-weight-asian="normal" style:font-weight-complex="normal"/>
    </style:style>
    <style:style style:name="P89" style:family="paragraph" style:parent-style-name="Text_20_body" style:list-style-name="L4">
      <style:paragraph-properties fo:margin-top="0in" fo:margin-bottom="0in" style:contextual-spacing="false" fo:line-height="150%" fo:text-align="justify" style:justify-single-word="false" fo:orphans="2" fo:widows="2" style:register-true="true" fo:padding="0in" fo:border="non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90" style:family="paragraph" style:parent-style-name="Text_20_body" style:list-style-name="L5">
      <style:paragraph-properties fo:margin-top="0in" fo:margin-bottom="0in" style:contextual-spacing="false" fo:line-height="150%" fo:text-align="justify" style:justify-single-word="false" fo:orphans="2" fo:widows="2" style:register-true="true" fo:padding="0in" fo:border="non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91" style:family="paragraph" style:parent-style-name="Text_20_body" style:list-style-name="L6">
      <style:paragraph-properties fo:margin-left="0in" fo:margin-right="0in" fo:margin-top="0in" fo:margin-bottom="0in" style:contextual-spacing="false" fo:line-height="150%" fo:text-align="justify" style:justify-single-word="false" fo:orphans="2" fo:widows="2" style:register-true="true" fo:text-indent="0in" style:auto-text-indent="false" fo:padding="0in" fo:border="non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92" style:family="paragraph" style:parent-style-name="Text_20_body" style:list-style-name="L7">
      <style:paragraph-properties fo:margin-top="0in" fo:margin-bottom="0in" style:contextual-spacing="false" fo:line-height="150%" fo:text-align="justify" style:justify-single-word="false" fo:orphans="2" fo:widows="2" style:register-true="true" fo:padding="0in" fo:border="non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93" style:family="paragraph" style:parent-style-name="Text_20_body">
      <style:paragraph-properties fo:margin-left="0in" fo:margin-right="0in" fo:margin-top="0.1665in" fo:margin-bottom="0.1665in" style:contextual-spacing="false" fo:line-height="150%" fo:text-align="justify" style:justify-single-word="false" fo:orphans="2" fo:widows="2" style:register-true="true" fo:text-indent="0in" style:auto-text-indent="false"/>
      <style:text-properties fo:font-variant="normal" fo:text-transform="none" fo:color="#000000" loext:opacity="100%" style:font-name="Times New Roman" fo:font-size="12pt" fo:letter-spacing="normal" fo:font-style="normal" fo:font-weight="normal" officeooo:paragraph-rsid="002fa018" style:font-weight-asian="normal" style:font-weight-complex="normal"/>
    </style:style>
    <style:style style:name="P94" style:family="paragraph" style:parent-style-name="Text_20_body">
      <style:paragraph-properties fo:margin-left="0in" fo:margin-right="0in" fo:margin-top="0in" fo:margin-bottom="0in" style:contextual-spacing="false" fo:line-height="150%" fo:text-align="justify" style:justify-single-word="false" fo:orphans="2" fo:widows="2" style:register-true="true" fo:text-indent="0in" style:auto-text-indent="false"/>
      <style:text-properties fo:font-variant="normal" fo:text-transform="none" fo:color="#000000" loext:opacity="100%" style:font-name="Times New Roman" fo:font-size="12pt" fo:letter-spacing="normal" fo:font-style="normal" fo:font-weight="normal" officeooo:paragraph-rsid="00860d1a" style:font-weight-asian="normal" style:font-weight-complex="normal"/>
    </style:style>
    <style:style style:name="P95" style:family="paragraph" style:parent-style-name="Text_20_body">
      <style:paragraph-properties fo:line-height="150%"/>
      <style:text-properties fo:font-variant="normal" fo:text-transform="none" fo:color="#000000" loext:opacity="100%" style:font-name="Times New Roman" fo:font-size="12pt" fo:letter-spacing="normal" fo:font-style="normal" fo:font-weight="normal" officeooo:paragraph-rsid="006db169" style:font-weight-asian="normal" style:font-weight-complex="normal"/>
    </style:style>
    <style:style style:name="P96"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97" style:family="paragraph" style:parent-style-name="Text_20_body">
      <style:paragraph-properties fo:margin-left="0in" fo:margin-right="0in" fo:margin-top="0in" fo:margin-bottom="0in" style:contextual-spacing="true" fo:line-height="150%"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98" style:family="paragraph" style:parent-style-name="Text_20_body">
      <style:paragraph-properties fo:margin-top="0in" fo:margin-bottom="0in" style:contextual-spacing="false" fo:line-height="150%"/>
      <style:text-properties fo:font-variant="normal" fo:text-transform="none" fo:color="#000000" loext:opacity="100%" style:font-name="Times New Roman" fo:font-size="12pt" fo:letter-spacing="normal" fo:font-style="normal" fo:font-weight="normal" officeooo:paragraph-rsid="007b6c04" style:font-weight-asian="normal" style:font-weight-complex="normal"/>
    </style:style>
    <style:style style:name="P99" style:family="paragraph" style:parent-style-name="Text_20_body">
      <style:paragraph-properties fo:margin-left="0in" fo:margin-right="0in" fo:margin-top="0in" fo:margin-bottom="0in" style:contextual-spacing="false" fo:line-height="150%" fo:text-align="justify" style:justify-single-word="false" fo:orphans="2" fo:widows="2" style:register-true="true" fo:text-indent="0in" style:auto-text-indent="false"/>
      <style:text-properties fo:font-variant="normal" fo:text-transform="none" fo:color="#000000" loext:opacity="100%" style:font-name="Times New Roman" fo:font-size="12pt" fo:letter-spacing="normal" fo:font-style="normal" fo:font-weight="normal" officeooo:rsid="002fa018" officeooo:paragraph-rsid="0071b521" style:font-weight-asian="normal" style:font-weight-complex="normal"/>
    </style:style>
    <style:style style:name="P100"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101"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102" style:family="paragraph" style:parent-style-name="Text_20_body" style:list-style-name="L19">
      <style:paragraph-properties fo:margin-left="0in" fo:margin-right="0in" fo:margin-top="0in" fo:margin-bottom="0in" style:contextual-spacing="false" fo:line-height="150%" fo:orphans="2" fo:widows="2" style:register-true="true" fo:text-indent="0in" style:auto-text-indent="false" fo:padding="0in" fo:border="none"/>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103" style:family="paragraph" style:parent-style-name="Text_20_body">
      <style:paragraph-properties fo:margin-left="0in" fo:margin-right="0in" fo:margin-top="0.1665in" fo:margin-bottom="0.1665in" style:contextual-spacing="false" fo:line-height="150%" fo:text-align="justify" style:justify-single-word="false" fo:orphans="2" fo:widows="2" style:register-true="true" fo:text-indent="0in" style:auto-text-indent="false" fo:break-before="page"/>
      <style:text-properties fo:font-variant="normal" fo:text-transform="none" fo:color="#000000" loext:opacity="100%" style:font-name="Times New Roman" fo:font-size="12pt" fo:letter-spacing="normal" fo:font-style="normal" fo:font-weight="bold" officeooo:rsid="002fa018" officeooo:paragraph-rsid="0071b521" style:font-weight-asian="bold" style:font-weight-complex="bold"/>
    </style:style>
    <style:style style:name="P104" style:family="paragraph" style:parent-style-name="Text_20_body">
      <style:paragraph-properties fo:margin-left="0in" fo:margin-right="0in" fo:margin-top="0in" fo:margin-bottom="0in" style:contextual-spacing="true" fo:line-height="150%" fo:orphans="2" fo:widows="2" style:register-true="true" fo:text-indent="0in" style:auto-text-indent="false" fo:break-before="page"/>
      <style:text-properties fo:font-variant="normal" fo:text-transform="none" fo:color="#000000" loext:opacity="100%" style:font-name="Times New Roman" fo:font-size="12pt" fo:letter-spacing="normal" fo:font-style="normal" fo:font-weight="bold" officeooo:rsid="0036f557" officeooo:paragraph-rsid="0036f557" style:font-size-asian="12pt" style:font-weight-asian="bold" style:font-size-complex="12pt" style:font-weight-complex="bold"/>
    </style:style>
    <style:style style:name="P105" style:family="paragraph" style:parent-style-name="Text_20_body">
      <style:paragraph-properties fo:margin-left="0in" fo:margin-right="0in" fo:margin-top="0.1665in" fo:margin-bottom="0in" style:contextual-spacing="false" fo:line-height="150%" style:register-true="true" fo:text-indent="0in" style:auto-text-indent="false"/>
      <style:text-properties fo:color="#000000" loext:opacity="100%" style:font-name="Times New Roman" fo:font-weight="normal" style:font-weight-asian="normal" style:font-weight-complex="normal"/>
    </style:style>
    <style:style style:name="P106" style:family="paragraph" style:parent-style-name="Text_20_body" style:list-style-name="L4">
      <style:paragraph-properties fo:margin-top="0in" fo:margin-bottom="0in" style:contextual-spacing="false" fo:line-height="150%" fo:text-align="justify" style:justify-single-word="false" fo:orphans="2" fo:widows="2" style:register-true="true" fo:padding="0in" fo:border="none"/>
      <style:text-properties style:font-name="Times New Roman"/>
    </style:style>
    <style:style style:name="P107" style:family="paragraph" style:parent-style-name="Text_20_body" style:list-style-name="L7">
      <style:paragraph-properties fo:margin-top="0in" fo:margin-bottom="0in" style:contextual-spacing="false" fo:line-height="150%" fo:text-align="justify" style:justify-single-word="false" fo:orphans="2" fo:widows="2" style:register-true="true" fo:padding="0in" fo:border="none"/>
      <style:text-properties style:font-name="Times New Roman"/>
    </style:style>
    <style:style style:name="P108" style:family="paragraph" style:parent-style-name="Text_20_body">
      <style:paragraph-properties fo:line-height="150%"/>
      <style:text-properties style:font-name="Times New Roman" officeooo:paragraph-rsid="006db169"/>
    </style:style>
    <style:style style:name="P109" style:family="paragraph" style:parent-style-name="Text_20_body">
      <style:paragraph-properties fo:margin-left="0in" fo:margin-right="0in" fo:margin-top="0in" fo:margin-bottom="0in" style:contextual-spacing="false" fo:line-height="150%" fo:orphans="2" fo:widows="2" style:register-true="true" fo:text-indent="0in" style:auto-text-indent="false"/>
      <style:text-properties style:font-name="Times New Roman" officeooo:paragraph-rsid="007b6c04"/>
    </style:style>
    <style:style style:name="P110" style:family="paragraph" style:parent-style-name="Text_20_body">
      <style:paragraph-properties fo:margin-left="0in" fo:margin-right="0in" fo:margin-top="0.1665in" fo:margin-bottom="0in" style:contextual-spacing="false" fo:line-height="150%" fo:orphans="2" fo:widows="2" style:register-true="true" fo:text-indent="0in" style:auto-text-indent="false"/>
      <style:text-properties style:font-name="Times New Roman"/>
    </style:style>
    <style:style style:name="P111" style:family="paragraph" style:parent-style-name="Text_20_body">
      <style:paragraph-properties fo:margin-left="0in" fo:margin-right="0in" fo:margin-top="0in" fo:margin-bottom="0in" style:contextual-spacing="false" fo:line-height="150%" fo:orphans="2" fo:widows="2" style:register-true="true" fo:text-indent="0in" style:auto-text-indent="false" fo:padding="0in" fo:border="none"/>
      <style:text-properties style:font-name="Times New Roman"/>
    </style:style>
    <style:style style:name="P112"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text-properties style:font-name="Times New Roman" officeooo:paragraph-rsid="00464d4b"/>
    </style:style>
    <style:style style:name="P113" style:family="paragraph" style:parent-style-name="Text_20_body">
      <style:paragraph-properties fo:margin-left="0in" fo:margin-right="0in" fo:margin-top="0.1665in" fo:margin-bottom="0.1665in" style:contextual-spacing="false" fo:line-height="150%" fo:orphans="2" fo:widows="2" style:register-true="true" fo:text-indent="0in" style:auto-text-indent="false"/>
      <style:text-properties style:font-name="Times New Roman" officeooo:paragraph-rsid="005f19f5"/>
    </style:style>
    <style:style style:name="P114" style:family="paragraph" style:parent-style-name="Text_20_body">
      <style:paragraph-properties fo:margin-top="0in" fo:margin-bottom="0in" style:contextual-spacing="false" fo:line-height="150%"/>
      <style:text-properties style:font-name="Times New Roman" officeooo:paragraph-rsid="007b6c04"/>
    </style:style>
    <style:style style:name="P115" style:family="paragraph" style:parent-style-name="Text_20_body">
      <style:paragraph-properties fo:line-height="150%"/>
      <style:text-properties style:font-name="Times New Roman"/>
    </style:style>
    <style:style style:name="P116" style:family="paragraph" style:parent-style-name="Text_20_body" style:list-style-name="L24">
      <style:paragraph-properties fo:margin-top="0in" fo:margin-bottom="0in" style:contextual-spacing="false" fo:line-height="150%"/>
      <style:text-properties style:font-name="Times New Roman"/>
    </style:style>
    <style:style style:name="P117" style:family="paragraph" style:parent-style-name="Text_20_body" style:list-style-name="L24">
      <style:paragraph-properties fo:line-height="150%"/>
      <style:text-properties style:font-name="Times New Roman"/>
    </style:style>
    <style:style style:name="P118" style:family="paragraph" style:parent-style-name="Text_20_body" style:list-style-name="L25">
      <style:paragraph-properties fo:margin-top="0in" fo:margin-bottom="0in" style:contextual-spacing="false" fo:line-height="150%"/>
      <style:text-properties style:font-name="Times New Roman"/>
    </style:style>
    <style:style style:name="P119" style:family="paragraph" style:parent-style-name="Text_20_body" style:list-style-name="L25">
      <style:paragraph-properties fo:line-height="150%"/>
      <style:text-properties style:font-name="Times New Roman"/>
    </style:style>
    <style:style style:name="P120" style:family="paragraph" style:parent-style-name="Text_20_body" style:list-style-name="L26">
      <style:paragraph-properties fo:margin-top="0in" fo:margin-bottom="0in" style:contextual-spacing="false" fo:line-height="150%"/>
      <style:text-properties style:font-name="Times New Roman"/>
    </style:style>
    <style:style style:name="P121" style:family="paragraph" style:parent-style-name="Text_20_body" style:list-style-name="L26">
      <style:paragraph-properties fo:line-height="150%"/>
      <style:text-properties style:font-name="Times New Roman"/>
    </style:style>
    <style:style style:name="P122" style:family="paragraph" style:parent-style-name="Text_20_body" style:list-style-name="L27">
      <style:paragraph-properties fo:margin-top="0in" fo:margin-bottom="0in" style:contextual-spacing="false" fo:line-height="150%"/>
      <style:text-properties style:font-name="Times New Roman"/>
    </style:style>
    <style:style style:name="P123" style:family="paragraph" style:parent-style-name="Text_20_body" style:list-style-name="L27">
      <style:paragraph-properties fo:line-height="150%"/>
      <style:text-properties style:font-name="Times New Roman"/>
    </style:style>
    <style:style style:name="P124" style:family="paragraph" style:parent-style-name="Text_20_body" style:list-style-name="L28">
      <style:paragraph-properties fo:margin-top="0in" fo:margin-bottom="0in" style:contextual-spacing="false" fo:line-height="150%"/>
      <style:text-properties style:font-name="Times New Roman"/>
    </style:style>
    <style:style style:name="P125" style:family="paragraph" style:parent-style-name="Text_20_body" style:list-style-name="L28">
      <style:paragraph-properties fo:line-height="150%"/>
      <style:text-properties style:font-name="Times New Roman"/>
    </style:style>
    <style:style style:name="P126" style:family="paragraph" style:parent-style-name="Text_20_body" style:list-style-name="L29">
      <style:paragraph-properties fo:margin-top="0in" fo:margin-bottom="0in" style:contextual-spacing="false" fo:line-height="150%"/>
      <style:text-properties style:font-name="Times New Roman"/>
    </style:style>
    <style:style style:name="P127" style:family="paragraph" style:parent-style-name="Text_20_body" style:list-style-name="L29">
      <style:paragraph-properties fo:line-height="150%"/>
      <style:text-properties style:font-name="Times New Roman"/>
    </style:style>
    <style:style style:name="P128" style:family="paragraph" style:parent-style-name="Text_20_body" style:list-style-name="L30">
      <style:paragraph-properties fo:margin-top="0in" fo:margin-bottom="0in" style:contextual-spacing="false" fo:line-height="150%"/>
      <style:text-properties style:font-name="Times New Roman"/>
    </style:style>
    <style:style style:name="P129" style:family="paragraph" style:parent-style-name="Text_20_body" style:list-style-name="L30">
      <style:paragraph-properties fo:line-height="150%"/>
      <style:text-properties style:font-name="Times New Roman"/>
    </style:style>
    <style:style style:name="P130" style:family="paragraph" style:parent-style-name="Text_20_body" style:list-style-name="L31">
      <style:paragraph-properties fo:margin-top="0in" fo:margin-bottom="0in" style:contextual-spacing="false" fo:line-height="150%"/>
      <style:text-properties style:font-name="Times New Roman"/>
    </style:style>
    <style:style style:name="P131" style:family="paragraph" style:parent-style-name="Text_20_body" style:list-style-name="L31">
      <style:paragraph-properties fo:line-height="150%"/>
      <style:text-properties style:font-name="Times New Roman"/>
    </style:style>
    <style:style style:name="P132" style:family="paragraph" style:parent-style-name="Text_20_body" style:list-style-name="L32">
      <style:paragraph-properties fo:margin-top="0in" fo:margin-bottom="0in" style:contextual-spacing="false" fo:line-height="150%"/>
      <style:text-properties style:font-name="Times New Roman"/>
    </style:style>
    <style:style style:name="P133" style:family="paragraph" style:parent-style-name="Text_20_body" style:list-style-name="L32">
      <style:paragraph-properties fo:line-height="150%"/>
      <style:text-properties style:font-name="Times New Roman"/>
    </style:style>
    <style:style style:name="P134" style:family="paragraph" style:parent-style-name="Text_20_body" style:list-style-name="L33">
      <style:paragraph-properties fo:margin-top="0in" fo:margin-bottom="0in" style:contextual-spacing="false" fo:line-height="150%"/>
      <style:text-properties style:font-name="Times New Roman"/>
    </style:style>
    <style:style style:name="P135" style:family="paragraph" style:parent-style-name="Text_20_body" style:list-style-name="L33">
      <style:paragraph-properties fo:line-height="150%"/>
      <style:text-properties style:font-name="Times New Roman"/>
    </style:style>
    <style:style style:name="P136" style:family="paragraph" style:parent-style-name="Text_20_body" style:list-style-name="L34">
      <style:paragraph-properties fo:margin-top="0in" fo:margin-bottom="0in" style:contextual-spacing="false" fo:line-height="150%"/>
      <style:text-properties style:font-name="Times New Roman"/>
    </style:style>
    <style:style style:name="P137" style:family="paragraph" style:parent-style-name="Text_20_body" style:list-style-name="L34">
      <style:paragraph-properties fo:line-height="150%"/>
      <style:text-properties style:font-name="Times New Roman"/>
    </style:style>
    <style:style style:name="P138" style:family="paragraph" style:parent-style-name="Text_20_body" style:list-style-name="L35">
      <style:paragraph-properties fo:margin-top="0in" fo:margin-bottom="0in" style:contextual-spacing="false" fo:line-height="150%"/>
      <style:text-properties style:font-name="Times New Roman"/>
    </style:style>
    <style:style style:name="P139" style:family="paragraph" style:parent-style-name="Text_20_body" style:list-style-name="L35">
      <style:paragraph-properties fo:line-height="150%"/>
      <style:text-properties style:font-name="Times New Roman"/>
    </style:style>
    <style:style style:name="P140" style:family="paragraph" style:parent-style-name="Text_20_body" style:list-style-name="L36">
      <style:paragraph-properties fo:margin-top="0in" fo:margin-bottom="0in" style:contextual-spacing="false" fo:line-height="150%"/>
      <style:text-properties style:font-name="Times New Roman"/>
    </style:style>
    <style:style style:name="P141" style:family="paragraph" style:parent-style-name="Text_20_body" style:list-style-name="L36">
      <style:paragraph-properties fo:line-height="150%"/>
      <style:text-properties style:font-name="Times New Roman"/>
    </style:style>
    <style:style style:name="P142" style:family="paragraph" style:parent-style-name="Text_20_body" style:list-style-name="L37">
      <style:paragraph-properties fo:margin-top="0in" fo:margin-bottom="0in" style:contextual-spacing="false" fo:line-height="150%"/>
      <style:text-properties style:font-name="Times New Roman"/>
    </style:style>
    <style:style style:name="P143" style:family="paragraph" style:parent-style-name="Text_20_body" style:list-style-name="L37">
      <style:paragraph-properties fo:line-height="150%"/>
      <style:text-properties style:font-name="Times New Roman"/>
    </style:style>
    <style:style style:name="P144" style:family="paragraph" style:parent-style-name="Text_20_body" style:list-style-name="L38">
      <style:paragraph-properties fo:margin-top="0in" fo:margin-bottom="0in" style:contextual-spacing="false" fo:line-height="150%"/>
      <style:text-properties style:font-name="Times New Roman"/>
    </style:style>
    <style:style style:name="P145" style:family="paragraph" style:parent-style-name="Text_20_body" style:list-style-name="L38">
      <style:paragraph-properties fo:line-height="150%"/>
      <style:text-properties style:font-name="Times New Roman"/>
    </style:style>
    <style:style style:name="P146" style:family="paragraph" style:parent-style-name="Text_20_body" style:list-style-name="L39">
      <style:paragraph-properties fo:margin-top="0in" fo:margin-bottom="0in" style:contextual-spacing="false" fo:line-height="150%"/>
      <style:text-properties style:font-name="Times New Roman"/>
    </style:style>
    <style:style style:name="P147" style:family="paragraph" style:parent-style-name="Text_20_body" style:list-style-name="L39">
      <style:paragraph-properties fo:line-height="150%"/>
      <style:text-properties style:font-name="Times New Roman"/>
    </style:style>
    <style:style style:name="P148" style:family="paragraph" style:parent-style-name="Text_20_body" style:list-style-name="L40">
      <style:paragraph-properties fo:margin-top="0in" fo:margin-bottom="0in" style:contextual-spacing="false" fo:line-height="150%"/>
      <style:text-properties style:font-name="Times New Roman"/>
    </style:style>
    <style:style style:name="P149" style:family="paragraph" style:parent-style-name="Text_20_body" style:list-style-name="L40">
      <style:paragraph-properties fo:line-height="150%"/>
      <style:text-properties style:font-name="Times New Roman"/>
    </style:style>
    <style:style style:name="P150" style:family="paragraph" style:parent-style-name="Text_20_body" style:list-style-name="L41">
      <style:paragraph-properties fo:margin-top="0in" fo:margin-bottom="0in" style:contextual-spacing="false" fo:line-height="150%"/>
      <style:text-properties style:font-name="Times New Roman"/>
    </style:style>
    <style:style style:name="P151" style:family="paragraph" style:parent-style-name="Text_20_body" style:list-style-name="L41">
      <style:paragraph-properties fo:line-height="150%"/>
      <style:text-properties style:font-name="Times New Roman"/>
    </style:style>
    <style:style style:name="P152" style:family="paragraph" style:parent-style-name="Text_20_body" style:list-style-name="L42">
      <style:paragraph-properties fo:margin-top="0in" fo:margin-bottom="0in" style:contextual-spacing="false" fo:line-height="150%"/>
      <style:text-properties style:font-name="Times New Roman"/>
    </style:style>
    <style:style style:name="P153" style:family="paragraph" style:parent-style-name="Text_20_body" style:list-style-name="L42">
      <style:paragraph-properties fo:line-height="150%"/>
      <style:text-properties style:font-name="Times New Roman"/>
    </style:style>
    <style:style style:name="P154" style:family="paragraph" style:parent-style-name="Text_20_body" style:list-style-name="L43">
      <style:paragraph-properties fo:margin-top="0in" fo:margin-bottom="0in" style:contextual-spacing="false" fo:line-height="150%"/>
      <style:text-properties style:font-name="Times New Roman"/>
    </style:style>
    <style:style style:name="P155" style:family="paragraph" style:parent-style-name="Text_20_body" style:list-style-name="L43">
      <style:paragraph-properties fo:line-height="150%"/>
      <style:text-properties style:font-name="Times New Roman"/>
    </style:style>
    <style:style style:name="P156" style:family="paragraph" style:parent-style-name="Text_20_body" style:list-style-name="L44">
      <style:paragraph-properties fo:margin-top="0in" fo:margin-bottom="0in" style:contextual-spacing="false" fo:line-height="150%"/>
      <style:text-properties style:font-name="Times New Roman"/>
    </style:style>
    <style:style style:name="P157" style:family="paragraph" style:parent-style-name="Text_20_body" style:list-style-name="L44">
      <style:paragraph-properties fo:line-height="150%"/>
      <style:text-properties style:font-name="Times New Roman"/>
    </style:style>
    <style:style style:name="P158" style:family="paragraph" style:parent-style-name="Text_20_body" style:list-style-name="L45">
      <style:paragraph-properties fo:margin-top="0in" fo:margin-bottom="0in" style:contextual-spacing="false" fo:line-height="150%"/>
      <style:text-properties style:font-name="Times New Roman"/>
    </style:style>
    <style:style style:name="P159" style:family="paragraph" style:parent-style-name="Text_20_body" style:list-style-name="L45">
      <style:paragraph-properties fo:margin-top="0in" fo:margin-bottom="6in" style:contextual-spacing="false" fo:line-height="150%"/>
      <style:text-properties style:font-name="Times New Roman"/>
    </style:style>
    <style:style style:name="P160" style:family="paragraph" style:parent-style-name="Text_20_body" style:list-style-name="L46">
      <style:paragraph-properties fo:margin-top="0in" fo:margin-bottom="0in" style:contextual-spacing="false" fo:line-height="150%"/>
      <style:text-properties style:font-name="Times New Roman"/>
    </style:style>
    <style:style style:name="P161" style:family="paragraph" style:parent-style-name="Text_20_body" style:list-style-name="L46">
      <style:paragraph-properties fo:line-height="150%"/>
      <style:text-properties style:font-name="Times New Roman"/>
    </style:style>
    <style:style style:name="P162" style:family="paragraph" style:parent-style-name="Text_20_body" style:list-style-name="L47">
      <style:paragraph-properties fo:margin-top="0in" fo:margin-bottom="0in" style:contextual-spacing="false" fo:line-height="150%"/>
      <style:text-properties style:font-name="Times New Roman"/>
    </style:style>
    <style:style style:name="P163" style:family="paragraph" style:parent-style-name="Text_20_body" style:list-style-name="L47">
      <style:paragraph-properties fo:line-height="150%"/>
      <style:text-properties style:font-name="Times New Roman"/>
    </style:style>
    <style:style style:name="P164" style:family="paragraph" style:parent-style-name="Text_20_body" style:list-style-name="L48">
      <style:paragraph-properties fo:margin-top="0in" fo:margin-bottom="0in" style:contextual-spacing="false" fo:line-height="150%"/>
      <style:text-properties style:font-name="Times New Roman"/>
    </style:style>
    <style:style style:name="P165" style:family="paragraph" style:parent-style-name="Text_20_body" style:list-style-name="L49">
      <style:paragraph-properties fo:margin-top="0in" fo:margin-bottom="0in" style:contextual-spacing="false" fo:line-height="150%"/>
      <style:text-properties style:font-name="Times New Roman"/>
    </style:style>
    <style:style style:name="P166" style:family="paragraph" style:parent-style-name="Text_20_body" style:list-style-name="L49">
      <style:paragraph-properties fo:line-height="150%"/>
      <style:text-properties style:font-name="Times New Roman"/>
    </style:style>
    <style:style style:name="P167" style:family="paragraph" style:parent-style-name="Text_20_body" style:list-style-name="L50">
      <style:paragraph-properties fo:margin-top="0in" fo:margin-bottom="0in" style:contextual-spacing="false" fo:line-height="150%"/>
      <style:text-properties style:font-name="Times New Roman"/>
    </style:style>
    <style:style style:name="P168" style:family="paragraph" style:parent-style-name="Text_20_body" style:list-style-name="L50">
      <style:paragraph-properties fo:line-height="150%"/>
      <style:text-properties style:font-name="Times New Roman"/>
    </style:style>
    <style:style style:name="T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2" style:family="text">
      <style:text-properties fo:font-variant="normal" fo:text-transform="none" fo:color="#000000" loext:opacity="100%" fo:font-size="12pt" fo:letter-spacing="normal" fo:font-style="normal"/>
    </style:style>
    <style:style style:name="T3" style:family="text">
      <style:text-properties fo:font-variant="normal" fo:text-transform="none" fo:color="#000000" loext:opacity="100%" fo:font-size="12pt" fo:letter-spacing="normal" fo:font-style="normal" fo:font-weight="normal"/>
    </style:style>
    <style:style style:name="T4" style:family="text">
      <style:text-properties fo:font-variant="normal" fo:text-transform="none" fo:color="#000000" loext:opacity="100%" fo:font-size="12pt" fo:letter-spacing="normal" fo:font-style="normal" fo:font-weight="normal" style:font-weight-asian="normal" style:font-weight-complex="normal"/>
    </style:style>
    <style:style style:name="T5" style:family="text">
      <style:text-properties fo:font-variant="normal" fo:text-transform="none" fo:color="#000000" loext:opacity="100%" fo:font-size="12pt" fo:letter-spacing="normal" fo:font-style="normal" fo:font-weight="normal" officeooo:rsid="002a760a" style:font-weight-asian="normal" style:font-weight-complex="normal"/>
    </style:style>
    <style:style style:name="T6" style:family="text">
      <style:text-properties fo:font-variant="normal" fo:text-transform="none" fo:color="#000000" loext:opacity="100%" fo:font-size="12pt" fo:letter-spacing="normal" fo:font-style="normal" fo:font-weight="normal" officeooo:rsid="0025e065" style:font-weight-asian="normal" style:font-weight-complex="normal"/>
    </style:style>
    <style:style style:name="T7" style:family="text">
      <style:text-properties fo:font-variant="normal" fo:text-transform="none" fo:color="#000000" loext:opacity="100%" fo:font-size="12pt" fo:letter-spacing="normal" fo:font-style="normal" fo:font-weight="normal" officeooo:rsid="00334bc5" style:font-weight-asian="normal" style:font-weight-complex="normal"/>
    </style:style>
    <style:style style:name="T8" style:family="text">
      <style:text-properties fo:font-variant="normal" fo:text-transform="none" fo:color="#000000" loext:opacity="100%" fo:font-size="12pt" fo:letter-spacing="normal" fo:font-style="normal" fo:font-weight="normal" officeooo:rsid="003c1f4c" style:font-weight-asian="normal" style:font-weight-complex="normal"/>
    </style:style>
    <style:style style:name="T9" style:family="text">
      <style:text-properties fo:font-variant="normal" fo:text-transform="none" fo:color="#000000" loext:opacity="100%" fo:font-size="12pt" fo:letter-spacing="normal" fo:font-style="normal" fo:font-weight="normal" officeooo:rsid="003d07cc" style:font-weight-asian="normal" style:font-weight-complex="normal"/>
    </style:style>
    <style:style style:name="T10" style:family="text">
      <style:text-properties fo:font-variant="normal" fo:text-transform="none" fo:color="#000000" loext:opacity="100%" fo:font-size="12pt" fo:letter-spacing="normal" fo:font-style="normal" fo:font-weight="normal" officeooo:rsid="00831bf5" style:font-weight-asian="normal" style:font-weight-complex="normal"/>
    </style:style>
    <style:style style:name="T11"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loext:opacity="100%" fo:font-size="12pt" fo:letter-spacing="normal" fo:font-style="normal" fo:font-weight="normal" officeooo:rsid="00464d4b" style:font-size-asian="12pt" style:font-weight-asian="normal" style:font-size-complex="12pt" style:font-weight-complex="normal"/>
    </style:style>
    <style:style style:name="T13" style:family="text">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T14" style:family="text">
      <style:text-properties fo:font-variant="normal" fo:text-transform="none" fo:color="#000000" loext:opacity="100%" style:font-name="Times New Roman" fo:font-size="12pt" fo:letter-spacing="normal" fo:font-style="normal" fo:font-weight="normal" officeooo:rsid="0005b30b" style:font-weight-asian="normal" style:font-weight-complex="normal"/>
    </style:style>
    <style:style style:name="T15" style:family="text">
      <style:text-properties fo:font-variant="normal" fo:text-transform="none" fo:color="#000000" loext:opacity="100%" style:font-name="Times New Roman" fo:font-size="12pt" fo:letter-spacing="normal" fo:font-style="normal" fo:font-weight="normal" officeooo:rsid="0018cf8f" style:font-weight-asian="normal" style:font-weight-complex="normal"/>
    </style:style>
    <style:style style:name="T16" style:family="text">
      <style:text-properties fo:font-variant="normal" fo:text-transform="none" fo:color="#000000" loext:opacity="100%" style:font-name="Times New Roman" fo:font-size="12pt" fo:letter-spacing="normal" fo:font-style="normal" fo:font-weight="normal" officeooo:rsid="0005b30b"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font-name="Times New Roman" fo:font-size="12pt" fo:letter-spacing="normal" fo:font-style="normal" fo:font-weight="normal" officeooo:rsid="00101bca"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font-name="Times New Roman" fo:font-size="12pt" fo:letter-spacing="normal" fo:font-style="normal" fo:font-weight="normal" officeooo:rsid="001106a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font-name="Times New Roman" fo:font-size="12pt" fo:letter-spacing="normal" fo:font-style="normal" fo:font-weight="normal" officeooo:rsid="00187d32"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loext:opacity="100%" style:font-name="Times New Roman" fo:font-size="12pt" fo:letter-spacing="normal" fo:font-style="normal" fo:font-weight="bold" officeooo:rsid="00101bca"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loext:opacity="100%" style:font-name="Times New Roman" fo:font-size="12pt" fo:letter-spacing="normal" fo:font-style="normal" fo:font-weight="bold" officeooo:rsid="00187d32"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loext:opacity="100%" style:font-name="Times New Roman" fo:font-size="12pt" fo:letter-spacing="normal" fo:font-style="normal" fo:font-weight="bold" style:font-weight-asian="bold" style:font-weight-complex="bold"/>
    </style:style>
    <style:style style:name="T23" style:family="text">
      <style:text-properties fo:font-variant="normal" fo:text-transform="none" fo:color="#000000" loext:opacity="100%" style:font-name="Times New Roman" fo:font-size="12pt" fo:letter-spacing="normal" fo:font-style="normal" fo:font-weight="bold" officeooo:rsid="0018cf8f" style:font-weight-asian="bold" style:font-weight-complex="bold"/>
    </style:style>
    <style:style style:name="T24" style:family="text">
      <style:text-properties fo:font-variant="normal" fo:text-transform="none" fo:color="#000000" loext:opacity="100%" style:font-name="Times New Roman" fo:font-size="12pt" fo:letter-spacing="normal" fo:font-style="normal" fo:font-weight="normal"/>
    </style:style>
    <style:style style:name="T25" style:family="text">
      <style:text-properties fo:font-variant="normal" fo:text-transform="none" fo:color="#000000" loext:opacity="100%" style:font-name="Times New Roman" fo:font-size="12pt" fo:letter-spacing="normal" fo:font-style="normal" fo:font-weight="normal" officeooo:rsid="0021307a"/>
    </style:style>
    <style:style style:name="T26" style:family="text">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T27" style:family="text">
      <style:text-properties fo:font-variant="normal" fo:text-transform="none" fo:color="#000000" loext:opacity="100%" style:font-name="Times New Roman" fo:font-size="12pt" fo:letter-spacing="normal" fo:font-style="normal" fo:font-weight="normal" officeooo:rsid="0021307a" style:font-weight-asian="normal" style:font-weight-complex="normal"/>
    </style:style>
    <style:style style:name="T28" style:family="text">
      <style:text-properties fo:font-variant="normal" fo:text-transform="none" fo:color="#000000" loext:opacity="100%" style:font-name="Times New Roman" fo:font-size="12pt" fo:letter-spacing="normal" fo:font-style="normal" fo:font-weight="normal" officeooo:rsid="0022c891" style:font-weight-asian="normal" style:font-weight-complex="normal"/>
    </style:style>
    <style:style style:name="T29" style:family="text">
      <style:text-properties fo:font-variant="normal" fo:text-transform="none" fo:color="#000000" loext:opacity="100%" style:font-name="Times New Roman" fo:font-size="12pt" fo:letter-spacing="normal" fo:font-style="normal" fo:font-weight="normal" officeooo:rsid="001cd297" style:font-weight-asian="normal" style:font-weight-complex="normal"/>
    </style:style>
    <style:style style:name="T30" style:family="text">
      <style:text-properties fo:font-variant="normal" fo:text-transform="none" fo:color="#000000" loext:opacity="100%" style:font-name="Times New Roman" fo:font-size="12pt" fo:letter-spacing="normal" fo:font-style="normal" fo:font-weight="normal" officeooo:rsid="002fa018" style:font-weight-asian="normal" style:font-weight-complex="normal"/>
    </style:style>
    <style:style style:name="T31" style:family="text">
      <style:text-properties fo:font-variant="normal" fo:text-transform="none" fo:color="#000000" loext:opacity="100%" style:font-name="Times New Roman" fo:font-size="12pt" fo:letter-spacing="normal" fo:font-style="normal" fo:font-weight="normal" officeooo:rsid="003180e7" style:font-weight-asian="normal" style:font-weight-complex="normal"/>
    </style:style>
    <style:style style:name="T32" style:family="text">
      <style:text-properties fo:font-variant="normal" fo:text-transform="none" fo:color="#000000" loext:opacity="100%" style:font-name="Times New Roman" fo:font-size="12pt" fo:letter-spacing="normal" fo:font-style="normal" fo:font-weight="normal" officeooo:rsid="00334bc5" style:font-weight-asian="normal" style:font-weight-complex="normal"/>
    </style:style>
    <style:style style:name="T33" style:family="text">
      <style:text-properties fo:font-variant="normal" fo:text-transform="none" fo:color="#000000" loext:opacity="100%" style:font-name="Times New Roman" fo:font-size="12pt" fo:letter-spacing="normal" fo:font-style="normal" fo:font-weight="normal" officeooo:rsid="003d07cc" style:font-weight-asian="normal" style:font-weight-complex="normal"/>
    </style:style>
    <style:style style:name="T34" style:family="text">
      <style:text-properties fo:font-variant="normal" fo:text-transform="none" fo:color="#000000" loext:opacity="100%" style:font-name="Times New Roman" fo:font-size="12pt" fo:letter-spacing="normal" fo:font-style="normal" fo:font-weight="normal" officeooo:rsid="00423029" style:font-weight-asian="normal" style:font-weight-complex="normal"/>
    </style:style>
    <style:style style:name="T35" style:family="text">
      <style:text-properties fo:font-variant="normal" fo:text-transform="none" fo:color="#000000" loext:opacity="100%" style:font-name="Times New Roman" fo:font-size="12pt" fo:letter-spacing="normal" fo:font-style="normal" fo:font-weight="normal" officeooo:rsid="00448d48" style:font-weight-asian="normal" style:font-weight-complex="normal"/>
    </style:style>
    <style:style style:name="T36"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loext:opacity="100%" style:font-name="Times New Roman" fo:font-size="12pt" fo:letter-spacing="normal" fo:font-style="normal" fo:font-weight="normal" officeooo:rsid="00464d4b" style:font-size-asian="12pt" style:font-weight-asian="normal" style:font-size-complex="12pt" style:font-weight-complex="normal"/>
    </style:style>
    <style:style style:name="T38" style:family="text">
      <style:text-properties fo:font-variant="normal" fo:text-transform="none" fo:color="#000000" loext:opacity="100%" style:font-name="Times New Roman" fo:font-size="12pt" fo:letter-spacing="normal" fo:font-style="normal" fo:font-weight="normal" officeooo:rsid="00484000" style:font-size-asian="12pt" style:font-weight-asian="normal" style:font-size-complex="12pt" style:font-weight-complex="normal"/>
    </style:style>
    <style:style style:name="T39" style:family="text">
      <style:text-properties fo:font-variant="normal" fo:text-transform="none" fo:color="#000000" loext:opacity="100%" style:font-name="Times New Roman" fo:font-size="12pt" fo:letter-spacing="normal" fo:font-style="normal" fo:font-weight="normal" officeooo:rsid="0049c091" style:font-size-asian="12pt" style:font-weight-asian="normal" style:font-size-complex="12pt" style:font-weight-complex="normal"/>
    </style:style>
    <style:style style:name="T40" style:family="text">
      <style:text-properties fo:font-variant="normal" fo:text-transform="none" fo:color="#000000" loext:opacity="100%" style:font-name="Times New Roman" fo:font-size="12pt" fo:letter-spacing="normal" fo:font-style="normal" fo:font-weight="normal" officeooo:rsid="004abfb2" style:font-size-asian="12pt" style:font-weight-asian="normal" style:font-size-complex="12pt" style:font-weight-complex="normal"/>
    </style:style>
    <style:style style:name="T41" style:family="text">
      <style:text-properties fo:font-variant="normal" fo:text-transform="none" fo:color="#000000" loext:opacity="100%" style:font-name="Times New Roman" fo:font-size="12pt" fo:letter-spacing="normal" fo:font-style="normal" fo:font-weight="normal" officeooo:rsid="0036f557" style:font-size-asian="12pt" style:font-weight-asian="normal" style:font-size-complex="12pt" style:font-weight-complex="normal"/>
    </style:style>
    <style:style style:name="T42" style:family="text">
      <style:text-properties fo:font-variant="normal" fo:text-transform="none" fo:color="#000000" loext:opacity="100%" style:font-name="Times New Roman" fo:font-size="12pt" fo:letter-spacing="normal" fo:font-style="normal" fo:font-weight="normal" officeooo:rsid="0038e801" style:font-size-asian="12pt" style:font-weight-asian="normal" style:font-size-complex="12pt" style:font-weight-complex="normal"/>
    </style:style>
    <style:style style:name="T43"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44" style:family="text">
      <style:text-properties fo:font-variant="normal" fo:text-transform="none" fo:color="#000000" loext:opacity="100%" style:font-name="Times New Roman" fo:font-size="12pt" fo:letter-spacing="normal" fo:font-style="normal" fo:font-weight="bold" style:font-weight-asian="bold" style:font-weight-complex="bold"/>
    </style:style>
    <style:style style:name="T45" style:family="text">
      <style:text-properties fo:font-variant="normal" fo:text-transform="none" fo:color="#000000" loext:opacity="100%" style:font-name="Times New Roman" fo:font-size="12pt" fo:letter-spacing="normal" fo:font-style="normal" fo:font-weight="bold" officeooo:rsid="006dea0b" style:font-weight-asian="bold" style:font-weight-complex="bold"/>
    </style:style>
    <style:style style:name="T46" style:family="text">
      <style:text-properties fo:font-variant="normal" fo:text-transform="none" fo:color="#000000" loext:opacity="100%" style:font-name="Times New Roman" fo:font-size="12pt" fo:letter-spacing="normal" fo:font-style="normal" fo:font-weight="bold" officeooo:rsid="001cd297" style:font-weight-asian="bold" style:font-weight-complex="bold"/>
    </style:style>
    <style:style style:name="T47" style:family="text">
      <style:text-properties fo:font-variant="normal" fo:text-transform="none" fo:color="#000000" loext:opacity="100%" style:font-name="Times New Roman" fo:font-size="12pt" fo:letter-spacing="normal" fo:font-style="normal" fo:font-weight="bold" officeooo:rsid="0071b521" style:font-weight-asian="bold" style:font-weight-complex="bold"/>
    </style:style>
    <style:style style:name="T48" style:family="text">
      <style:text-properties fo:font-variant="normal" fo:text-transform="none" fo:color="#000000" loext:opacity="100%" style:font-name="Times New Roman" fo:font-size="12pt" fo:letter-spacing="normal" fo:font-style="normal" fo:font-weight="bold" officeooo:rsid="006f1b72" style:font-weight-asian="bold" style:font-weight-complex="bold"/>
    </style:style>
    <style:style style:name="T49" style:family="text">
      <style:text-properties fo:font-variant="normal" fo:text-transform="none" fo:color="#000000" loext:opacity="100%" style:font-name="Times New Roman" fo:font-size="12pt" fo:letter-spacing="normal" fo:font-style="normal" fo:font-weight="bold" officeooo:rsid="002fa018" style:font-weight-asian="bold" style:font-weight-complex="bold"/>
    </style:style>
    <style:style style:name="T50" style:family="text">
      <style:text-properties fo:font-variant="normal" fo:text-transform="none" fo:color="#000000" loext:opacity="100%" style:font-name="Times New Roman" fo:font-size="12pt" fo:letter-spacing="normal" fo:font-style="normal" fo:font-weight="bold" officeooo:rsid="007922e9" style:font-weight-asian="bold" style:font-weight-complex="bold"/>
    </style:style>
    <style:style style:name="T51" style:family="text">
      <style:text-properties fo:font-variant="normal" fo:text-transform="none" fo:color="#000000" loext:opacity="100%" style:font-name="Times New Roman" fo:font-size="12pt" fo:letter-spacing="normal" fo:font-style="normal" fo:font-weight="bold" officeooo:rsid="00868e13" style:font-weight-asian="bold" style:font-weight-complex="bold"/>
    </style:style>
    <style:style style:name="T52"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loext:opacity="100%" style:font-name="Times New Roman" fo:font-size="12pt" fo:letter-spacing="normal" fo:font-style="normal" fo:font-weight="bold" officeooo:rsid="0090956f" style:font-size-asian="12pt" style:font-weight-asian="bold" style:font-size-complex="12pt" style:font-weight-complex="bold"/>
    </style:style>
    <style:style style:name="T54" style:family="text">
      <style:text-properties fo:font-variant="normal" fo:text-transform="none" fo:color="#000000" loext:opacity="100%" style:font-name="Times New Roman" fo:font-size="12pt" fo:letter-spacing="normal" fo:font-style="normal" officeooo:rsid="006aa63c"/>
    </style:style>
    <style:style style:name="T55" style:family="text">
      <style:text-properties fo:color="#000000" loext:opacity="100%" fo:font-size="12pt" style:font-size-asian="12pt" style:font-size-complex="12pt"/>
    </style:style>
    <style:style style:name="T56" style:family="text">
      <style:text-properties fo:color="#000000" loext:opacity="100%" style:font-name="Times New Roman" fo:font-weight="normal" style:font-weight-asian="normal" style:font-weight-complex="normal"/>
    </style:style>
    <style:style style:name="T57" style:family="text">
      <style:text-properties officeooo:rsid="00233e49"/>
    </style:style>
    <style:style style:name="T58" style:family="text">
      <style:text-properties officeooo:rsid="00248d56"/>
    </style:style>
    <style:style style:name="T59" style:family="text">
      <style:text-properties officeooo:rsid="00334bc5"/>
    </style:style>
    <style:style style:name="T60" style:family="text">
      <style:text-properties style:font-name="Times New Roman"/>
    </style:style>
    <style:style style:name="T61" style:family="text">
      <style:text-properties style:font-name="Times New Roman" officeooo:rsid="00187d32"/>
    </style:style>
    <style:style style:name="T62" style:family="text">
      <style:text-properties style:font-name="Times New Roman" fo:font-weight="normal" style:font-weight-asian="normal" style:font-weight-complex="normal"/>
    </style:style>
    <style:style style:name="T63" style:family="text">
      <style:text-properties officeooo:rsid="002fd54a"/>
    </style:style>
    <style:style style:name="T64" style:family="text">
      <style:text-properties officeooo:rsid="0071b521"/>
    </style:style>
    <style:style style:name="T65" style:family="text">
      <style:text-properties officeooo:rsid="0077d5f5"/>
    </style:style>
    <style:style style:name="T66" style:family="text">
      <style:text-properties style:font-name="Times New Roman"/>
    </style:style>
    <style:style style:name="T67" style:family="text">
      <style:text-properties style:font-name="Times New Roman" officeooo:rsid="006dea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1" text:anchor-type="char" svg:width="1.5547in" svg:height="1.5547in" draw:z-index="0"><draw:image xlink:href="Pictures/10000000000000E1000000E1E698176D.png" xlink:type="simple" xlink:show="embed" xlink:actuate="onLoad" draw:mime-type="image/png"/></draw:frame><text:span text:style-name="Strong_20_Emphasis"><text:span text:style-name="T13"/></text:span></text:p>
      <text:p text:style-name="P23"><text:span text:style-name="Strong_20_Emphasis"><text:span text:style-name="T13"/></text:span></text:p>
      <text:p text:style-name="P23"><text:span text:style-name="Strong_20_Emphasis"><text:span text:style-name="T13"/></text:span></text:p>
      <text:p text:style-name="P23"><text:span text:style-name="Strong_20_Emphasis"><text:span text:style-name="T13"/></text:span></text:p>
      <text:p text:style-name="P23"><text:span text:style-name="Strong_20_Emphasis"><text:span text:style-name="T13"/></text:span></text:p>
      <text:p text:style-name="P23"><text:span text:style-name="Strong_20_Emphasis"><text:span text:style-name="T13"/></text:span></text:p>
      <text:p text:style-name="P23"><text:span text:style-name="Strong_20_Emphasis"><text:span text:style-name="T13"/></text:span></text:p>
      <text:p text:style-name="P23"><text:span text:style-name="Strong_20_Emphasis"><text:span text:style-name="T13">The Event-Based Dating Model: A Project to Reduce Superficiality in Digital Romance</text:span></text:span></text:p>
      <text:p text:style-name="P23"><text:span text:style-name="Strong_20_Emphasis"><text:span text:style-name="T13"/></text:span></text:p>
      <text:p text:style-name="P25"><text:span text:style-name="Strong_20_Emphasis"><text:span text:style-name="T14"/></text:span></text:p>
      <text:p text:style-name="P25"><text:span text:style-name="Strong_20_Emphasis"><text:span text:style-name="T14"/></text:span></text:p>
      <text:p text:style-name="P25"><text:span text:style-name="Strong_20_Emphasis"><text:span text:style-name="T14"/></text:span></text:p>
      <text:p text:style-name="P25"><text:span text:style-name="Strong_20_Emphasis"><text:span text:style-name="T14"/></text:span></text:p>
      <text:p text:style-name="P25"><text:span text:style-name="Strong_20_Emphasis"><text:span text:style-name="T14"/></text:span></text:p>
      <text:p text:style-name="P25"><text:span text:style-name="Strong_20_Emphasis"><text:span text:style-name="T14">JONAH LOMU OTIENO</text:span></text:span></text:p>
      <text:p text:style-name="P25"><text:span text:style-name="Strong_20_Emphasis"><text:span text:style-name="T14"/></text:span></text:p>
      <text:p text:style-name="P25"><text:span text:style-name="Strong_20_Emphasis"><text:span text:style-name="T14">CCS/00002/022</text:span></text:span></text:p>
      <text:p text:style-name="P25"><text:span text:style-name="Strong_20_Emphasis"><text:span text:style-name="T14"/></text:span></text:p>
      <text:p text:style-name="P25"><text:span text:style-name="Strong_20_Emphasis"><text:span text:style-name="T14">BACHELOR OF SCIENCE COMPUTER SCIENCE</text:span></text:span></text:p>
      <text:p text:style-name="P25"><text:span text:style-name="Strong_20_Emphasis"><text:span text:style-name="T14"/></text:span></text:p>
      <text:p text:style-name="P25"><text:span text:style-name="Strong_20_Emphasis"><text:span text:style-name="T14">MASENO UNIVERSITY</text:span></text:span></text:p>
      <text:p text:style-name="P25"><text:span text:style-name="Strong_20_Emphasis"><text:span text:style-name="T14"/></text:span></text:p>
      <text:p text:style-name="P25"><text:span text:style-name="Strong_20_Emphasis"><text:span text:style-name="T14">SCHOOL OF COMPUTING AND INFORMATICS</text:span></text:span></text:p>
      <text:p text:style-name="P25"><text:span text:style-name="Strong_20_Emphasis"><text:span text:style-name="T14"/></text:span></text:p>
      <text:p text:style-name="P19"><text:span text:style-name="Strong_20_Emphasis"><text:span text:style-name="T14">DEPARTMENT OF COMPUTER SCIENCE</text:span></text:span></text:p>
      <text:p text:style-name="P9"><text:span text:style-name="Strong_20_Emphasis"><text:span text:style-name="T14"/></text:span></text:p>
      <text:p text:style-name="P9"><text:span text:style-name="Strong_20_Emphasis"><text:span text:style-name="T14"/></text:span></text:p>
      <text:p text:style-name="P51"><text:span text:style-name="Strong_20_Emphasis"><text:span text:style-name="T16">A project proposal submitted to the Department of Computer Science <text:s/>in the School of computing and informatics in partial fulfillment of the requirements for the award of the degree of Bachelors of Science Computer Science</text:span></text:span></text:p>
      <text:p text:style-name="P52"><text:span text:style-name="Strong_20_Emphasis"><text:span text:style-name="T20">Declaration</text:span></text:span></text:p>
      <text:p text:style-name="P11"><text:span text:style-name="Strong_20_Emphasis"><text:span text:style-name="T17">I declare that this work has not been <text:s/>previously submitted and approved for reward of a degree by Maseno University or any other university. To the best of my knowledge and belief, the proposal contains no material previously published nor written by another person except where due reference is made in proposal itself. </text:span></text:span></text:p>
      <text:p text:style-name="P11"><text:span text:style-name="Strong_20_Emphasis"><text:span text:style-name="T17"/></text:span></text:p>
      <text:p text:style-name="P11"><text:span text:style-name="Strong_20_Emphasis"><text:span text:style-name="T17">Jonah Lomu Otieno<text:tab/></text:span></text:span></text:p>
      <text:p text:style-name="P11"><text:span text:style-name="Strong_20_Emphasis"><text:span text:style-name="T17">CCS/00002/022<text:tab/><text:tab/><text:tab/><text:tab/><text:tab/><text:tab/>Date</text:span></text:span></text:p>
      <text:p text:style-name="P11"><text:span text:style-name="Strong_20_Emphasis"><text:span text:style-name="T17">…………………….<text:tab/><text:tab/><text:tab/><text:tab/><text:tab/><text:tab/>…………………….</text:span></text:span></text:p>
      <text:p text:style-name="P11"><text:span text:style-name="Strong_20_Emphasis"><text:span text:style-name="T17"/></text:span></text:p>
      <text:p text:style-name="P11"><text:span text:style-name="Strong_20_Emphasis"><text:span text:style-name="T17">This project has been submitted for examination with my approval as University Supervisor.</text:span></text:span></text:p>
      <text:p text:style-name="P11"><text:span text:style-name="Strong_20_Emphasis"><text:span text:style-name="T17"/></text:span></text:p>
      <text:p text:style-name="P11"><text:span text:style-name="Strong_20_Emphasis"><text:span text:style-name="T17">M</text:span></text:span><text:span text:style-name="Strong_20_Emphasis"><text:span text:style-name="T18">r</text:span></text:span><text:span text:style-name="Strong_20_Emphasis"><text:span text:style-name="T17"> </text:span></text:span><text:span text:style-name="Strong_20_Emphasis"><text:span text:style-name="T18">S. A </text:span></text:span><text:span text:style-name="Strong_20_Emphasis"><text:span text:style-name="T17">Nyabundi<text:tab/><text:tab/><text:tab/><text:tab/><text:tab/><text:tab/></text:span></text:span><text:span text:style-name="Strong_20_Emphasis"><text:span text:style-name="T18">Date</text:span></text:span></text:p>
      <text:p text:style-name="P11"><text:span text:style-name="Strong_20_Emphasis"><text:span text:style-name="T17">…………………….<text:tab/><text:tab/><text:tab/><text:tab/><text:tab/><text:tab/>……………………..</text:span></text:span></text:p>
      <text:p text:style-name="P53"/>
      <text:p text:style-name="P50"><text:span text:style-name="Strong_20_Emphasis"><text:span text:style-name="T21">Acknowledgments</text:span></text:span></text:p>
      <text:p text:style-name="P13"><text:span text:style-name="Strong_20_Emphasis"><text:span text:style-name="T19">I wish to express my sincere gratitude to all those who contributed to the successful completion of this project.</text:span></text:span></text:p>
      <text:p text:style-name="P18"><text:span text:style-name="T60">First, I extend my heartfelt appreciation t</text:span><text:span text:style-name="T61">o my mother</text:span><text:span text:style-name="T60"> and </text:span><text:span text:style-name="Strong_20_Emphasis"><text:span text:style-name="T62">my family</text:span></text:span><text:span text:style-name="T60"> for their constant love, encouragement, and unwavering support throughout the entire process. Their belief in me has been my greatest motivation.</text:span></text:p>
      <text:p text:style-name="P18"><text:span text:style-name="T60">I am deeply grateful to </text:span><text:span text:style-name="Strong_20_Emphasis"><text:span text:style-name="T62">my supervisor</text:span></text:span><text:span text:style-name="T62">,</text:span><text:span text:style-name="T60"> whose guidance, constructive feedback, and support have been invaluable in shaping this project. Their expertise and commitment greatly enhanced the quality of my work.</text:span></text:p>
      <text:p text:style-name="P26">To everyone else who contributed in any way, directly or indirectly, I sincerely thank you.</text:p>
      <text:p text:style-name="P12"><text:span text:style-name="Strong_20_Emphasis"><text:span text:style-name="T19"/></text:span></text:p>
      <text:p text:style-name="P10"><text:span text:style-name="Strong_20_Emphasis"><text:span text:style-name="T22">Abstract</text:span></text:span><text:span text:style-name="Strong_20_Emphasis"><text:span text:style-name="T13"><text:line-break/>This project proposes the development of a new dating application that utilizes an event-based model to address the prevalent issues of superficiality and user fatigue in current mobile dating solutions. Unlike traditional apps that prioritize rapid profile-swiping, our platform, "Lomu" centers on user-generated local events as the primary mechanism for connection. Users connect by mutually agreeing to attend an event, with full profile visibility (including photos) deferred until a set time before the meeting. This design encourages investment in the shared activity and fosters initial interaction based on personality and common interests. The project encompasses the conceptual framework, user experience flow, and a prototype design, arguing that this model can create more meaningful first interactions and improve long-term user satisfaction in the online dating space.</text:span></text:span></text:p>
      <text:p text:style-name="P15"><text:span text:style-name="Strong_20_Emphasis"><text:span text:style-name="T23">Keywords:</text:span></text:span></text:p>
      <text:p text:style-name="P14"><text:span text:style-name="Strong_20_Emphasis"><text:span text:style-name="T15">event-based model</text:span></text:span></text:p>
      <text:p text:style-name="P14"><text:span text:style-name="Strong_20_Emphasis"><text:span text:style-name="T15">mutually</text:span></text:span></text:p>
      <text:p text:style-name="P14"><text:span text:style-name="Strong_20_Emphasis"><text:span text:style-name="T15">conceptual framework</text:span></text:span></text:p>
      <text:p text:style-name="P14"><text:span text:style-name="Strong_20_Emphasis"><text:span text:style-name="T15">user experience flow</text:span></text:span></text:p>
      <text:p text:style-name="P14"><text:span text:style-name="Strong_20_Emphasis"><text:span text:style-name="T15">prototype design,</text:span></text:span></text:p>
      <text:p text:style-name="P54"/>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1"><text:a xlink:type="simple" xlink:href="#__RefHeading___Toc3803_1729350629" text:style-name="Index_20_Link" text:visited-style-name="Index_20_Link">CHAPTER ONE: INTRODUCTION<text:tab/>8</text:a></text:p>
          <text:p text:style-name="P32"><text:a xlink:type="simple" xlink:href="#__RefHeading___Toc3681_1729350629" text:style-name="Index_20_Link" text:visited-style-name="Index_20_Link">1.1 Statement of the Problem<text:tab/>8</text:a></text:p>
          <text:p text:style-name="P32"><text:a xlink:type="simple" xlink:href="#__RefHeading___Toc3685_1729350629" text:style-name="Index_20_Link" text:visited-style-name="Index_20_Link">1.2 Proposed Solution<text:tab/>10</text:a></text:p>
          <text:p text:style-name="P32"><text:a xlink:type="simple" xlink:href="#__RefHeading___Toc3687_1729350629" text:style-name="Index_20_Link" text:visited-style-name="Index_20_Link">1.3 Objectives<text:tab/>11</text:a></text:p>
          <text:p text:style-name="P33"><text:a xlink:type="simple" xlink:href="#__RefHeading___Toc5407_3375418934" text:style-name="Index_20_Link" text:visited-style-name="Index_20_Link">1.3.1 General Objective<text:tab/>11</text:a></text:p>
          <text:p text:style-name="P33"><text:a xlink:type="simple" xlink:href="#__RefHeading___Toc5409_3375418934" text:style-name="Index_20_Link" text:visited-style-name="Index_20_Link">1.3.2 Specific Objectives<text:tab/>11</text:a></text:p>
          <text:p text:style-name="P32"><text:a xlink:type="simple" xlink:href="#__RefHeading___Toc3689_1729350629" text:style-name="Index_20_Link" text:visited-style-name="Index_20_Link">1.4 Research Questions<text:tab/>12</text:a></text:p>
          <text:p text:style-name="P32"><text:a xlink:type="simple" xlink:href="#__RefHeading___Toc3691_1729350629" text:style-name="Index_20_Link" text:visited-style-name="Index_20_Link">1.5 Justification<text:tab/>12</text:a></text:p>
          <text:p text:style-name="P32"><text:a xlink:type="simple" xlink:href="#__RefHeading___Toc3805_1729350629" text:style-name="Index_20_Link" text:visited-style-name="Index_20_Link">2.1 Introduction<text:tab/>14</text:a></text:p>
          <text:p text:style-name="P32"><text:a xlink:type="simple" xlink:href="#__RefHeading___Toc3695_1729350629" text:style-name="Index_20_Link" text:visited-style-name="Index_20_Link">2.2 Theoretical Review and Conceptual Framework<text:tab/>15</text:a></text:p>
          <text:p text:style-name="P33"><text:a xlink:type="simple" xlink:href="#__RefHeading___Toc5411_3375418934" text:style-name="Index_20_Link" text:visited-style-name="Index_20_Link">2.2.1 The Influence of Interface Design Paradigm on Social Interaction<text:tab/>15</text:a></text:p>
          <text:p text:style-name="P33"><text:a xlink:type="simple" xlink:href="#__RefHeading___Toc3807_1729350629" text:style-name="Index_20_Link" text:visited-style-name="Index_20_Link">2.2.2 Choice Architecture and the Paradox of Choice<text:tab/>16</text:a></text:p>
          <text:p text:style-name="P33"><text:a xlink:type="simple" xlink:href="#__RefHeading___Toc3701_1729350629" text:style-name="Index_20_Link" text:visited-style-name="Index_20_Link">2.2.3 The Primacy of Visual Information<text:tab/>16</text:a></text:p>
          <text:p text:style-name="P33"><text:a xlink:type="simple" xlink:href="#__RefHeading___Toc5415_3375418934" text:style-name="Index_20_Link" text:visited-style-name="Index_20_Link">2.2.4 Conceptual Framework<text:tab/>17</text:a></text:p>
          <text:p text:style-name="P32"><text:a xlink:type="simple" xlink:href="#__RefHeading___Toc3705_1729350629" text:style-name="Index_20_Link" text:visited-style-name="Index_20_Link">2.3 Critique of the Existing Literature<text:tab/>18</text:a></text:p>
          <text:p text:style-name="P32"><text:a xlink:type="simple" xlink:href="#__RefHeading___Toc3707_1729350629" text:style-name="Index_20_Link" text:visited-style-name="Index_20_Link">2.4 Summary<text:tab/>19</text:a></text:p>
          <text:p text:style-name="P32"><text:a xlink:type="simple" xlink:href="#__RefHeading___Toc3709_1729350629" text:style-name="Index_20_Link" text:visited-style-name="Index_20_Link">2.5 Research Gaps<text:tab/>20</text:a></text:p>
          <text:p text:style-name="P33"><text:a xlink:type="simple" xlink:href="#__RefHeading___Toc6319_3375418934" text:style-name="Index_20_Link" text:visited-style-name="Index_20_Link">2.5.1 The Translational Design Gap: <text:tab/>20</text:a></text:p>
          <text:p text:style-name="P33"><text:a xlink:type="simple" xlink:href="#__RefHeading___Toc6321_3375418934" text:style-name="Index_20_Link" text:visited-style-name="Index_20_Link">2.5.2 The Paradigm Innovation Gap: <text:tab/>20</text:a></text:p>
          <text:p text:style-name="P32"><text:a xlink:type="simple" xlink:href="#__RefHeading___Toc3811_1729350629" text:style-name="Index_20_Link" text:visited-style-name="Index_20_Link">3.1 Introduction<text:tab/>21</text:a></text:p>
          <text:p text:style-name="P32"><text:a xlink:type="simple" xlink:href="#__RefHeading___Toc5419_3375418934" text:style-name="Index_20_Link" text:visited-style-name="Index_20_Link">3.2 Systems Development Methodology<text:tab/>21</text:a></text:p>
          <text:p text:style-name="P32"><text:a xlink:type="simple" xlink:href="#__RefHeading___Toc5431_3375418934" text:style-name="Index_20_Link" text:visited-style-name="Index_20_Link">3.3 Feasibility Study<text:tab/>23</text:a></text:p>
          <text:p text:style-name="P33"><text:a xlink:type="simple" xlink:href="#__RefHeading___Toc3813_1729350629" text:style-name="Index_20_Link" text:visited-style-name="Index_20_Link">3.3.1 Technical Feasibility<text:tab/>23</text:a></text:p>
          <text:p text:style-name="P33"><text:a xlink:type="simple" xlink:href="#__RefHeading___Toc3815_1729350629" text:style-name="Index_20_Link" text:visited-style-name="Index_20_Link">3.3.2 Economic Feasibility<text:tab/>23</text:a></text:p>
          <text:p text:style-name="P33"><text:a xlink:type="simple" xlink:href="#__RefHeading___Toc3817_1729350629" text:style-name="Index_20_Link" text:visited-style-name="Index_20_Link">3.3.3 Operational Feasibility<text:tab/>24</text:a></text:p>
          <text:p text:style-name="P33"><text:a xlink:type="simple" xlink:href="#__RefHeading___Toc3819_1729350629" text:style-name="Index_20_Link" text:visited-style-name="Index_20_Link">3.3.4. Scheduling Feasibility<text:tab/>24</text:a></text:p>
          <text:p text:style-name="P33"><text:a xlink:type="simple" xlink:href="#__RefHeading___Toc3821_1729350629" text:style-name="Index_20_Link" text:visited-style-name="Index_20_Link">3.3.5 Feasibility Conclusion<text:tab/>24</text:a></text:p>
          <text:p text:style-name="P32"><text:a xlink:type="simple" xlink:href="#__RefHeading___Toc3832_1729350629" text:style-name="Index_20_Link" text:visited-style-name="Index_20_Link">3.4 Requirements Elicitation: Data Collection<text:tab/>25</text:a></text:p>
          <text:p text:style-name="P34"><text:a xlink:type="simple" xlink:href="#__RefHeading___Toc3717_1729350629" text:style-name="Index_20_Link" text:visited-style-name="Index_20_Link">1. Data Collection Tool A: Semi-Structured Interview Guide (Qualitative)<text:tab/>25</text:a></text:p>
          <text:p text:style-name="P34"><text:a xlink:type="simple" xlink:href="#__RefHeading___Toc3719_1729350629" text:style-name="Index_20_Link" text:visited-style-name="Index_20_Link">2. Data Collection Tool B: Online Questionnaire (Quantitative)<text:tab/>25</text:a></text:p>
          <text:p text:style-name="P34"><text:a xlink:type="simple" xlink:href="#__RefHeading___Toc3721_1729350629" text:style-name="Index_20_Link" text:visited-style-name="Index_20_Link">3. Relevance to Problem and Objectives<text:tab/>26</text:a></text:p>
          <text:p text:style-name="P32"><text:a xlink:type="simple" xlink:href="#__RefHeading___Toc3723_1729350629" text:style-name="Index_20_Link" text:visited-style-name="Index_20_Link">3.5 Data and System Analysis<text:tab/>27</text:a></text:p>
          <text:p text:style-name="P32"><text:a xlink:type="simple" xlink:href="#__RefHeading___Toc5427_3375418934" text:style-name="Index_20_Link" text:visited-style-name="Index_20_Link">3.6 System Specification<text:tab/>28</text:a></text:p>
          <text:p text:style-name="P32"><text:a xlink:type="simple" xlink:href="#__RefHeading___Toc5429_3375418934" text:style-name="Index_20_Link" text:visited-style-name="Index_20_Link">Based on the problem analysis, literature review, and user data, the following system specifications are defined.<text:tab/>28</text:a></text:p>
          <text:p text:style-name="P33"><text:a xlink:type="simple" xlink:href="#__RefHeading___Toc3823_1729350629" text:style-name="Index_20_Link" text:visited-style-name="Index_20_Link"><text:soft-page-break/>3.6.1 Functional Requirements<text:tab/>28</text:a></text:p>
          <text:p text:style-name="P33"><text:a xlink:type="simple" xlink:href="#__RefHeading___Toc3825_1729350629" text:style-name="Index_20_Link" text:visited-style-name="Index_20_Link">3.6.2 Non-Functional Requirements<text:tab/>29</text:a></text:p>
          <text:p text:style-name="P32"><text:a xlink:type="simple" xlink:href="#__RefHeading___Toc3727_1729350629" text:style-name="Index_20_Link" text:visited-style-name="Index_20_Link">3.7 System Modeling and Detailed Specification<text:tab/>29</text:a></text:p>
          <text:p text:style-name="P33"><text:a xlink:type="simple" xlink:href="#__RefHeading___Toc3827_1729350629" text:style-name="Index_20_Link" text:visited-style-name="Index_20_Link">3.7.1 Input/Output Specification<text:tab/>29</text:a></text:p>
          <text:p text:style-name="P32"><text:a xlink:type="simple" xlink:href="#__RefHeading___Toc5028_3375418934" text:style-name="Index_20_Link" text:visited-style-name="Index_20_Link">Diagram. 1<text:tab/>31</text:a></text:p>
          <text:p text:style-name="P32"><text:a xlink:type="simple" xlink:href="#__RefHeading___Toc5030_3375418934" text:style-name="Index_20_Link" text:visited-style-name="Index_20_Link">Diagram. 2<text:tab/>32</text:a></text:p>
          <text:p text:style-name="P32"><text:a xlink:type="simple" xlink:href="#__RefHeading___Toc5032_3375418934" text:style-name="Index_20_Link" text:visited-style-name="Index_20_Link">Diagram. 3<text:tab/>33</text:a></text:p>
          <text:p text:style-name="P31"><text:a xlink:type="simple" xlink:href="#__RefHeading___Toc3729_1729350629" text:style-name="Index_20_Link" text:visited-style-name="Index_20_Link">CHAPTER 4: SYSTEM CODE GENERATION AND TESTING<text:tab/>34</text:a></text:p>
          <text:p text:style-name="P32"><text:a xlink:type="simple" xlink:href="#__RefHeading___Toc3731_1729350629" text:style-name="Index_20_Link" text:visited-style-name="Index_20_Link">4.1 System Code Generation<text:tab/>34</text:a></text:p>
          <text:p text:style-name="P33"><text:a xlink:type="simple" xlink:href="#__RefHeading___Toc3733_1729350629" text:style-name="Index_20_Link" text:visited-style-name="Index_20_Link">4.1.1 Frontend Development<text:tab/>34</text:a></text:p>
          <text:p text:style-name="P33"><text:a xlink:type="simple" xlink:href="#__RefHeading___Toc3735_1729350629" text:style-name="Index_20_Link" text:visited-style-name="Index_20_Link">4.1.2 Backend Development<text:tab/>34</text:a></text:p>
          <text:p text:style-name="P33"><text:a xlink:type="simple" xlink:href="#__RefHeading___Toc3737_1729350629" text:style-name="Index_20_Link" text:visited-style-name="Index_20_Link">4.1.3 Database Design<text:tab/>35</text:a></text:p>
          <text:p text:style-name="P33"><text:a xlink:type="simple" xlink:href="#__RefHeading___Toc3739_1729350629" text:style-name="Index_20_Link" text:visited-style-name="Index_20_Link">4.1.4 Code Quality and Version Control<text:tab/>35</text:a></text:p>
          <text:p text:style-name="P32"><text:a xlink:type="simple" xlink:href="#__RefHeading___Toc3741_1729350629" text:style-name="Index_20_Link" text:visited-style-name="Index_20_Link">4.2 System Testing<text:tab/>35</text:a></text:p>
          <text:p text:style-name="P33"><text:a xlink:type="simple" xlink:href="#__RefHeading___Toc3743_1729350629" text:style-name="Index_20_Link" text:visited-style-name="Index_20_Link">4.2.1 GUI Testing<text:tab/>35</text:a></text:p>
          <text:p text:style-name="P33"><text:a xlink:type="simple" xlink:href="#__RefHeading___Toc3745_1729350629" text:style-name="Index_20_Link" text:visited-style-name="Index_20_Link">4.2.2 Usability Testing<text:tab/>35</text:a></text:p>
          <text:p text:style-name="P33"><text:a xlink:type="simple" xlink:href="#__RefHeading___Toc3747_1729350629" text:style-name="Index_20_Link" text:visited-style-name="Index_20_Link">4.2.3 Performance Testing<text:tab/>36</text:a></text:p>
          <text:p text:style-name="P33"><text:a xlink:type="simple" xlink:href="#__RefHeading___Toc3749_1729350629" text:style-name="Index_20_Link" text:visited-style-name="Index_20_Link">4.2.4 White Box Testing<text:tab/>36</text:a></text:p>
          <text:p text:style-name="P33"><text:a xlink:type="simple" xlink:href="#__RefHeading___Toc3751_1729350629" text:style-name="Index_20_Link" text:visited-style-name="Index_20_Link">4.2.5 Load Testing<text:tab/>36</text:a></text:p>
          <text:p text:style-name="P33"><text:a xlink:type="simple" xlink:href="#__RefHeading___Toc3753_1729350629" text:style-name="Index_20_Link" text:visited-style-name="Index_20_Link">4.2.6 Regression Testing<text:tab/>36</text:a></text:p>
          <text:p text:style-name="P33"><text:a xlink:type="simple" xlink:href="#__RefHeading___Toc3755_1729350629" text:style-name="Index_20_Link" text:visited-style-name="Index_20_Link">4.2.7 Stress Testing<text:tab/>37</text:a></text:p>
          <text:p text:style-name="P33"><text:a xlink:type="simple" xlink:href="#__RefHeading___Toc3757_1729350629" text:style-name="Index_20_Link" text:visited-style-name="Index_20_Link">4.2.8 Smoke Testing<text:tab/>37</text:a></text:p>
          <text:p text:style-name="P33"><text:a xlink:type="simple" xlink:href="#__RefHeading___Toc3759_1729350629" text:style-name="Index_20_Link" text:visited-style-name="Index_20_Link">4.2.9 Unit Testing<text:tab/>37</text:a></text:p>
          <text:p text:style-name="P33"><text:a xlink:type="simple" xlink:href="#__RefHeading___Toc3761_1729350629" text:style-name="Index_20_Link" text:visited-style-name="Index_20_Link">4.2.10 Acceptance Testing<text:tab/>37</text:a></text:p>
          <text:p text:style-name="P33"><text:a xlink:type="simple" xlink:href="#__RefHeading___Toc3763_1729350629" text:style-name="Index_20_Link" text:visited-style-name="Index_20_Link">4.2.11 Black Box Testing<text:tab/>38</text:a></text:p>
          <text:p text:style-name="P33"><text:a xlink:type="simple" xlink:href="#__RefHeading___Toc3765_1729350629" text:style-name="Index_20_Link" text:visited-style-name="Index_20_Link">4.2.12 Functional Testing<text:tab/>38</text:a></text:p>
          <text:p text:style-name="P33"><text:a xlink:type="simple" xlink:href="#__RefHeading___Toc3767_1729350629" text:style-name="Index_20_Link" text:visited-style-name="Index_20_Link">4.2.13 Integration Testing<text:tab/>38</text:a></text:p>
          <text:p text:style-name="P33"><text:a xlink:type="simple" xlink:href="#__RefHeading___Toc3769_1729350629" text:style-name="Index_20_Link" text:visited-style-name="Index_20_Link">4.2.14 Security Testing<text:tab/>38</text:a></text:p>
          <text:p text:style-name="P33"><text:a xlink:type="simple" xlink:href="#__RefHeading___Toc3771_1729350629" text:style-name="Index_20_Link" text:visited-style-name="Index_20_Link">4.2.15 Portability/Compatibility Testing<text:tab/>38</text:a></text:p>
          <text:p text:style-name="P31"><text:a xlink:type="simple" xlink:href="#__RefHeading___Toc3773_1729350629" text:style-name="Index_20_Link" text:visited-style-name="Index_20_Link">CHAPTER 5: CONCLUSIONS AND RECOMMENDATIONS<text:tab/>39</text:a></text:p>
          <text:p text:style-name="P32"><text:a xlink:type="simple" xlink:href="#__RefHeading___Toc3775_1729350629" text:style-name="Index_20_Link" text:visited-style-name="Index_20_Link">5.1 Conclusions<text:tab/>39</text:a></text:p>
          <text:p text:style-name="P32"><text:a xlink:type="simple" xlink:href="#__RefHeading___Toc3777_1729350629" text:style-name="Index_20_Link" text:visited-style-name="Index_20_Link">5.2 Recommendations<text:tab/>39</text:a></text:p>
          <text:p text:style-name="P33"><text:a xlink:type="simple" xlink:href="#__RefHeading___Toc3779_1729350629" text:style-name="Index_20_Link" text:visited-style-name="Index_20_Link">1. Add Real-Time Messaging<text:tab/>39</text:a></text:p>
          <text:p text:style-name="P33"><text:a xlink:type="simple" xlink:href="#__RefHeading___Toc3781_1729350629" text:style-name="Index_20_Link" text:visited-style-name="Index_20_Link">2. Improve Matching Algorithm<text:tab/>39</text:a></text:p>
          <text:p text:style-name="P33"><text:a xlink:type="simple" xlink:href="#__RefHeading___Toc3783_1729350629" text:style-name="Index_20_Link" text:visited-style-name="Index_20_Link">3. Enhance Security<text:tab/>40</text:a></text:p>
          <text:p text:style-name="P33"><text:a xlink:type="simple" xlink:href="#__RefHeading___Toc3785_1729350629" text:style-name="Index_20_Link" text:visited-style-name="Index_20_Link">4. Performance Optimization<text:tab/>40</text:a></text:p>
          <text:p text:style-name="P33"><text:a xlink:type="simple" xlink:href="#__RefHeading___Toc3787_1729350629" text:style-name="Index_20_Link" text:visited-style-name="Index_20_Link">5. Cross-Platform Expansion<text:tab/>40</text:a></text:p>
          <text:p text:style-name="P31"><text:a xlink:type="simple" xlink:href="#__RefHeading___Toc3789_1729350629" text:style-name="Index_20_Link" text:visited-style-name="Index_20_Link">REFERENCES<text:tab/>41</text:a></text:p>
          <text:p text:style-name="P31"><text:a xlink:type="simple" xlink:href="#__RefHeading___Toc3791_1729350629" text:style-name="Index_20_Link" text:visited-style-name="Index_20_Link">APPENDICES<text:tab/>43</text:a></text:p>
          <text:p text:style-name="P32"><text:a xlink:type="simple" xlink:href="#__RefHeading___Toc3793_1729350629" text:style-name="Index_20_Link" text:visited-style-name="Index_20_Link">Appendix A: Sample API Routes<text:tab/>43</text:a></text:p>
          <text:p text:style-name="P32"><text:a xlink:type="simple" xlink:href="#__RefHeading___Toc3795_1729350629" text:style-name="Index_20_Link" text:visited-style-name="Index_20_Link"><text:soft-page-break/>Appendix B: Screenshots<text:tab/>43</text:a></text:p>
          <text:p text:style-name="P32"><text:a xlink:type="simple" xlink:href="#__RefHeading___Toc3797_1729350629" text:style-name="Index_20_Link" text:visited-style-name="Index_20_Link">Appendix C: Sample Code Snippet<text:tab/>43</text:a></text:p>
        </text:index-body>
      </text:table-of-content>
      <text:h text:style-name="P37" text:outline-level="1" text:is-list-header="true"><text:bookmark-start text:name="__RefHeading___Toc3803_1729350629"/><text:span text:style-name="Strong_20_Emphasis"><text:span text:style-name="T60">CHAPTER ONE: INTRODUCTION </text:span></text:span><text:bookmark-end text:name="__RefHeading___Toc3803_1729350629"/></text:h>
      <text:h text:style-name="P41" text:outline-level="2"><text:bookmark-start text:name="__RefHeading___Toc3681_1729350629"/><text:span text:style-name="Strong_20_Emphasis"><text:span text:style-name="T67">1.1</text:span></text:span><text:span text:style-name="Strong_20_Emphasis"><text:span text:style-name="T60"> Statement of the Problem</text:span></text:span><text:bookmark-end text:name="__RefHeading___Toc3681_1729350629"/></text:h>
      <text:p text:style-name="P83"><text:bookmark-start text:name="__RefHeading___Toc3683_1729350629"/><text:span text:style-name="T24">The </text:span><text:span text:style-name="T25">increase</text:span><text:span text:style-name="T24"> of digital dating applications over the past decade has fundamentally reshaped how individuals initiate romantic and social connections. While these platforms have increased access to potential partners, a growing body of evidence suggests that the dominant design paradigm—the "swipe-and-match" model—is generating significant negative externalities for user well-being and the quality of modern relationships. This project, </text:span><text:span text:style-name="Strong_20_Emphasis"><text:span text:style-name="T13">"</text:span></text:span><text:span text:style-name="Strong_20_Emphasis"><text:span text:style-name="T27">lomu</text:span></text:span><text:span text:style-name="Strong_20_Emphasis"><text:span text:style-name="T13">: Dating Designed for Serendipity,"</text:span></text:span><text:span text:style-name="T13"> </text:span><text:span text:style-name="T24">directly addresses the core problem: </text:span><text:span text:style-name="Strong_20_Emphasis"><text:span text:style-name="T13">The architectural design of mainstream dating applications fosters superficiality, leads to high rates of user burnout, and ultimately hinders the formation of genuine, sustainable connections.</text:span></text:span><text:bookmark-end text:name="__RefHeading___Toc3683_1729350629"/></text:p>
      <text:p text:style-name="P84">The problem is not a lack of potential partners, but the psychologically taxing environment in which connections are made. This can be broken down into three interconnected sub-problems:</text:p>
      <text:list text:style-name="L1">
        <text:list-item>
          <text:p text:style-name="P55"><text:span text:style-name="Strong_20_Emphasis"><text:span text:style-name="T13">The Paradox of Choice and Commodification of People:</text:span></text:span><text:span text:style-name="T13"> The infinite-scroll interface of profiles reduces potential partners to disposable commodities in a digital marketplace. A study associated with the University of Chicago Booth School of Business found that </text:span><text:span text:style-name="Strong_20_Emphasis"><text:span text:style-name="T13">an overwhelming number of choices can lead to decision paralysis, dissatisfaction, and self-blame</text:span></text:span><text:span text:style-name="T13"> (Lenton &amp; Francesconi, 2010). In the context of dating apps, this "paradox of choice" discourages users from investing deeply in any single match, fostering a "grass is greener" mentality where individuals are perpetually seeking a better option, thereby devaluing the present connection.</text:span></text:p>
        </text:list-item>
        <text:list-item>
          <text:p text:style-name="P55"><text:span text:style-name="Strong_20_Emphasis"><text:span text:style-name="T13">The Primacy of Physical Appearance and Profile Curation:</text:span></text:span><text:span text:style-name="T13"> The swipe mechanism is overwhelmingly based on a split-second judgment of a photograph. This design prioritizes physical appearance above all other </text:span><text:soft-page-break/><text:span text:style-name="T13">attributes, such as personality, values, or shared interests. Research published in the </text:span><text:span text:style-name="Emphasis"><text:span text:style-name="T13">Journal of Social and Personal Relationships</text:span></text:span><text:span text:style-name="T13"> has shown that </text:span><text:span text:style-name="Strong_20_Emphasis"><text:span text:style-name="T13">this focus on photos can lead to increased objectification and heightened anxiety about one's own self-image</text:span></text:span><text:span text:style-name="T13"> (Strubel &amp; Petrie, 2020). Furthermore, profiles become carefully curated personal brands, which are not always authentic representations of the individual, leading to mistrust and disappointment upon meeting in person.</text:span></text:p>
        </text:list-item>
        <text:list-item>
          <text:p text:style-name="P55"><text:span text:style-name="Strong_20_Emphasis"><text:span text:style-name="T13">User Burnout and Psychological Fatigue:</text:span></text:span><text:span text:style-name="T13"> The transactional nature of swiping, combined with low-quality interactions (e.g., ghosting, low-effort messaging), leads to high levels of user fatigue. A 2023 Pew Research Center study found that </text:span><text:span text:style-name="Strong_20_Emphasis"><text:span text:style-name="T13">a majority of dating app users in </text:span></text:span><text:span text:style-name="Strong_20_Emphasis"><text:span text:style-name="T28">Kenya. </text:span></text:span><text:span text:style-name="Strong_20_Emphasis"><text:span text:style-name="T13">(55%) report feeling disappointed by their interactions on the platforms</text:span></text:span><text:span text:style-name="T13">, with a significant portion describing their overall experience as somewhat or very negative. This is not merely an inconvenience; it has tangible effects on mental health, contributing to feelings of loneliness, rejection, and diminished self-esteem, even as users feel compelled to continue participating.</text:span></text:p>
        </text:list-item>
      </text:list>
      <text:p text:style-name="P16"><text:span text:style-name="T13">The magnitude of this problem is substantial. With an estimated </text:span><text:span text:style-name="Strong_20_Emphasis"><text:span text:style-name="T13">over 300 million people worldwide</text:span></text:span><text:span text:style-name="T13"> using dating apps, the psychological impact of these design flaws is widespread. The effects extend beyond individual dissatisfaction, influencing broader social dynamics by normalizing disposable interactions and eroding the skills and patience required for organic relationship building.</text:span></text:p>
      <text:p text:style-name="P17"><text:span text:style-name="T13">Therefore, the research problem this project investigates is not merely the existence of "bad" dating apps, but a fundamental flaw in their human-computer interaction (HCI) design. The core problem is that the </text:span><text:span text:style-name="Strong_20_Emphasis"><text:span text:style-name="T13">architectural framework of the dominant dating app model is misaligned with the psychological and social prerequisites for fostering authentic human connection.</text:span></text:span><text:span text:style-name="T13"> This project will attempt to solve this by proposing and designing a new framework—one centered on shared experiences and deferred visual judgment—to determine if a different digital environment can produce more positive and meaningful outcomes for its users. </text:span></text:p>
      <text:p text:style-name="P8"><text:soft-page-break/><text:span text:style-name="Strong_20_Emphasis"><text:span text:style-name="T29"/></text:span></text:p>
      <text:h text:style-name="P41" text:outline-level="2"><text:bookmark-start text:name="__RefHeading___Toc3685_1729350629"/><text:span text:style-name="Strong_20_Emphasis"><text:span text:style-name="T45">1.2 </text:span></text:span><text:span text:style-name="Strong_20_Emphasis"><text:span text:style-name="T46">Proposed Solution</text:span></text:span><text:bookmark-end text:name="__RefHeading___Toc3685_1729350629"/></text:h>
      <text:p text:style-name="P16"><text:span text:style-name="T13">This research seeks to design and evaluate a novel conceptual framework for digital dating that moves beyond the swipe-based paradigm to foster more authentic and sustainable connections. In response to the documented problems of superficiality, commodification, and user burnout, the proposed solution is an </text:span><text:span text:style-name="Strong_20_Emphasis"><text:span text:style-name="T13">experience-centric connection model</text:span></text:span><text:span text:style-name="T13">.</text:span></text:p>
      <text:p text:style-name="P85">Globally, the industry has seen iterative improvements within the existing paradigm, such as more sophisticated algorithms for match suggestion (e.g., Hinge's "Most Compatible") or features promoting profile depth (e.g., detailed prompts). Regionally, apps like <text:span text:style-name="T57">Tinder</text:span> have emphasized women making the first move to alter dynamic interactions. However, these models still operate within the fundamental structure of profiling and swiping on individuals, a design that inherently prioritizes appearance and encourages comparison.</text:p>
      <text:p text:style-name="P16"><text:span text:style-name="T13">A more radical departure can be seen in emerging concepts that integrate social features or focus on specific communities. However, many still fall short of decoupling the initial connection from direct profile evaluation. The solution proposed by this research does not seek to create a "better profile," but to </text:span><text:span text:style-name="Strong_20_Emphasis"><text:span text:style-name="T13">eliminate the profile-as-a-shopping-catalog metaphor entirely during the initial matching phase.</text:span></text:span></text:p>
      <text:p text:style-name="P16"><text:span text:style-name="T13">The core of this research is to investigate whether facilitating connections based on </text:span><text:span text:style-name="Strong_20_Emphasis"><text:span text:style-name="T13">mutual participation in a shared activity or experience</text:span></text:span><text:span text:style-name="T13"> can serve as a more effective and psychologically sustainable foundation for initial interaction. This model is predicated on established social science theory, which indicates that shared activities provide a natural context for interaction, reduce initial anxiety, and foster bonds based on cooperation and shared interest rather than mere physical attraction.</text:span></text:p>
      <text:p text:style-name="P94">Therefore, this research will conceptualize a system where:</text:p>
      <text:p text:style-name="P94"><text:soft-page-break/>The primary unit of interaction is a user-proposed real-world event or activity. Connection is initiated through a mutual commitment to an experience, not through a judgment of a curated profile.</text:p>
      <text:list text:style-name="L2">
        <text:list-header>
          <text:p text:style-name="P87">The revelation of personal identifiers (such as full profile photos) is intentionally deferred, forcing initial engagement to be based on personality, communication, and shared interests as they relate to the planned activity.</text:p>
        </text:list-header>
      </text:list>
      <text:p text:style-name="P86">This research seeks to validate the hypothesis that by <text:s/><text:span text:style-name="T58">configuring</text:span> a digital dating environment around shared experiences and delayed visual judgment, it is possible to mitigate the paradox of choice, reduce the emphasis on superficial appearance, and decrease user burnout, thereby increasing the potential for genuine connection. The outcome will be a comprehensive design framework that challenges the incumbent industry standards and offers a new pathway for the future of digital social interaction.</text:p>
      <text:p text:style-name="P8"><text:span text:style-name="Strong_20_Emphasis"><text:span text:style-name="T29"/></text:span></text:p>
      <text:h text:style-name="P41" text:outline-level="2"><text:bookmark-start text:name="__RefHeading___Toc3687_1729350629"/><text:span text:style-name="Strong_20_Emphasis"><text:span text:style-name="T45">1.3</text:span></text:span><text:span text:style-name="Strong_20_Emphasis"><text:span text:style-name="T46"> Objectives</text:span></text:span><text:bookmark-end text:name="__RefHeading___Toc3687_1729350629"/></text:h>
      <text:h text:style-name="Heading_20_3" text:outline-level="3"><text:bookmark-start text:name="__RefHeading___Toc5407_3375418934"/><text:span text:style-name="Strong_20_Emphasis"><text:span text:style-name="T51">1.3.1 </text:span></text:span><text:span text:style-name="Strong_20_Emphasis"><text:span text:style-name="T22">General Objective</text:span></text:span><text:bookmark-end text:name="__RefHeading___Toc5407_3375418934"/></text:h>
      <text:list text:style-name="L3">
        <text:list-item>
          <text:p text:style-name="P88">To design, develop, and evaluate a prototype for an experience-centric dating application that reduces superficiality and fosters more authentic initial connections.</text:p>
        </text:list-item>
      </text:list>
      <text:h text:style-name="Heading_20_3" text:outline-level="3"><text:bookmark-start text:name="__RefHeading___Toc5409_3375418934"/><text:span text:style-name="Strong_20_Emphasis"><text:span text:style-name="T51">1.3.2 </text:span></text:span><text:span text:style-name="Strong_20_Emphasis"><text:span text:style-name="T22">Specific Objectives</text:span></text:span><text:bookmark-end text:name="__RefHeading___Toc5409_3375418934"/></text:h>
      <text:list text:style-name="L4">
        <text:list-item>
          <text:p text:style-name="P89">To investigate and document the specific limitations of the swipe-based dating model and user requirements for a more authentic connection platform through a comprehensive analysis of existing literature and user surveys.</text:p>
        </text:list-item>
        <text:list-item>
          <text:p text:style-name="P106"><text:span text:style-name="T4">To design a complete system architecture and user interface prototype for the </text:span><text:span text:style-name="T5">lomu</text:span><text:span text:style-name="T4"> application that implements an event-based matching mechanism with deferred profile revelation.</text:span></text:p>
        </text:list-item>
        <text:list-item>
          <text:p text:style-name="P106"><text:span text:style-name="T4">To develop a functional, limited-scope prototype of the </text:span><text:span text:style-name="T6">lomu</text:span><text:span text:style-name="T4"> application capable of demonstrating the core event-creation, matching, and chat features.</text:span></text:p>
        </text:list-item>
        <text:list-item>
          <text:p text:style-name="P106"><text:soft-page-break/><text:span text:style-name="T4">To evaluate the prototype's effectiveness in mitigating user-reported issues of superficiality and burnout through controlled user acceptance testing (UAT) and structured feedback collection.</text:span></text:p>
        </text:list-item>
      </text:list>
      <text:h text:style-name="P41" text:outline-level="2"><text:bookmark-start text:name="__RefHeading___Toc3689_1729350629"/><text:span text:style-name="Strong_20_Emphasis"><text:span text:style-name="T47">1.4 </text:span></text:span><text:span text:style-name="Strong_20_Emphasis"><text:span text:style-name="T46">Research Questions</text:span></text:span><text:bookmark-end text:name="__RefHeading___Toc3689_1729350629"/></text:h>
      <text:list text:style-name="L5">
        <text:list-item>
          <text:p text:style-name="P90">What are the predominant user pain points and psychological impacts associated with the swipe-based dating model, and what key features do users identify as necessary for fostering more authentic digital connections?</text:p>
        </text:list-item>
      </text:list>
      <text:list text:style-name="L6">
        <text:list-header>
          <text:p text:style-name="P91"/>
        </text:list-header>
      </text:list>
      <text:list text:style-name="L7">
        <text:list-item>
          <text:p text:style-name="P92">How can principles of user experience (UX) design and social psychology be effectively integrated into a system architecture to shift user focus from profile evaluation to shared activity-based interaction?</text:p>
          <text:p text:style-name="P107"/>
        </text:list-item>
        <text:list-item>
          <text:p text:style-name="P92">To what extent can a functional prototype demonstrating an event-based matching mechanism be developed within a constrained timeline while maintaining core usability and stability?</text:p>
          <text:p text:style-name="P107"><text:span text:style-name="T4"/></text:p>
        </text:list-item>
        <text:list-item>
          <text:p text:style-name="P92">How does the experience-centric model, as implemented in the prototype, influence user perceptions of superficiality, connection quality, and overall engagement compared to their experiences with traditional dating applications?</text:p>
          <text:p text:style-name="P92"/>
        </text:list-item>
      </text:list>
      <text:h text:style-name="P41" text:outline-level="2"><text:bookmark-start text:name="__RefHeading___Toc3691_1729350629"/><text:span text:style-name="Strong_20_Emphasis"><text:span text:style-name="T48">1.5 </text:span></text:span><text:span text:style-name="Strong_20_Emphasis"><text:span text:style-name="T46">Justification</text:span></text:span><text:bookmark-end text:name="__RefHeading___Toc3691_1729350629"/></text:h>
      <text:p text:style-name="P108"><text:span text:style-name="T4">The justification for undertaking this research on the "</text:span><text:span text:style-name="T5">lomu</text:span><text:span text:style-name="T4">" dating application is threefold, addressing its necessity, its beneficiaries, and its contribution to the field.</text:span></text:p>
      <text:p text:style-name="P95">Firstly, this research is critically needed due to the documented and widespread user dissatisfaction with the current digital dating paradigm. As established, the swipe-based model is linked to psychological fatigue, superficial interactions, and a com modified approach to human connection. This project moves beyond merely identifying these problems and proposes a tangible, research-backed alternative. It is justified by the urgent need to explore more humane and effective digital social <text:soft-page-break/>environments that prioritize user well-being over engagement metrics that lead to burnout.</text:p>
      <text:p text:style-name="P16"><text:span text:style-name="T13">The outcomes of this research will benefit multiple stakeholders. </text:span><text:span text:style-name="Strong_20_Emphasis"><text:span text:style-name="T13">End-users</text:span></text:span><text:span text:style-name="T13"> stand to gain from a potentially less stressful and more meaningful platform for social connection, which could improve their overall digital well-being. </text:span><text:span text:style-name="Strong_20_Emphasis"><text:span text:style-name="T13">Application developers and the broader tech industry</text:span></text:span><text:span text:style-name="T13"> can benefit from a validated, alternative design framework that challenges the status quo, offering a new pathway for innovation in a saturated market. Furthermore, </text:span><text:span text:style-name="Strong_20_Emphasis"><text:span text:style-name="T13">academics and researchers</text:span></text:span><text:span text:style-name="T13"> in fields like Human-Computer Interaction and social psychology will gain valuable insights into how specific design choices can influence social dynamics and user psychology in digital spaces.</text:span></text:p>
      <text:p text:style-name="P93">This project contributes significantly to the research area by proposing and testing a novel "experience-centric connection model." While most existing solutions work within the profile-swipe framework, this research explores a fundamental architectural shift. Its primary contribution is an empirical investigation into whether decoupling the initial match from profile appraisal and anchoring it around a shared activity can mitigate the inherent problems of the dominant model. This provides a new perspective and a set of design principles for creating digital platforms that are intentionally engineered to foster genuine, rather than transactional, human interaction.</text:p>
      <text:p text:style-name="P103">CHAPTER TWO: LITERATURE REVIEW</text:p>
      <text:h text:style-name="P38" text:outline-level="2"><text:bookmark-start text:name="__RefHeading___Toc3805_1729350629"/><text:span text:style-name="T64">2.1 </text:span><text:span text:style-name="T63">Introduction</text:span><text:bookmark-end text:name="__RefHeading___Toc3805_1729350629"/></text:h>
      <text:p text:style-name="P99">This chapter provides a critical analysis of the existing body of knowledge relevant to the design and impact of digital dating applications, situating the proposed "lomu" project within the broader academic and industry discourse. The pervasive adoption of swipe-based platforms has generated significant interdisciplinary research, examining their effects on social behavior, psychological well-being, and human-computer interaction. A thorough review of this literature is essential to understand the validated problems inherent in current models and to identify gaps that justify an alternative approach.</text:p>
      <text:p text:style-name="P20"><text:span text:style-name="T56">The review is structured into four key thematic sections. First, it will examine the </text:span><text:span text:style-name="Strong_20_Emphasis"><text:span text:style-name="T56">Evolution and Dominant Paradigms of Digital Dating</text:span></text:span><text:span text:style-name="T56">, tracing the technological and cultural shift from early web-based systems to the current mobile-first, gamified swipe model. Second, it will synthesize research on the </text:span><text:span text:style-name="Strong_20_Emphasis"><text:span text:style-name="T56">Psychological and Social Impacts of Swipe-Based Design</text:span></text:span><text:span text:style-name="T56">, focusing on empirical evidence linking specific interface features to outcomes like choice paralysis, commodification, and user burnout. Third, it will explore existing </text:span><text:span text:style-name="Strong_20_Emphasis"><text:span text:style-name="T56">Alternative Models and Theoretical Frameworks for Digital Connection</text:span></text:span><text:span text:style-name="T56">, analyzing both commercial attempts at innovation and relevant social science theories that could inform a new design. Finally, it will investigate core </text:span><text:span text:style-name="Strong_20_Emphasis"><text:span text:style-name="T56">Design Principles for Fostering Authenticity and Reducing Superficiality</text:span></text:span><text:span text:style-name="T56"> in digital social platforms, drawing from literature in HCI, social psychology, and behavioral design.</text:span></text:p>
      <text:p text:style-name="P105">The purpose of this review is not merely to catalog previous work, but to build a foundational argument. It will demonstrate that while the problems of mainstream dating apps are well-documented, most solutions remain incremental tweaks within a flawed paradigm. By identifying the theoretical and practical gaps—particularly the lack of mainstream platforms that successfully de-prioritize visual assessment and re-center shared experience—this chapter will establish a clear academic and practical justification for the experience-centric model proposed by this research.</text:p>
      <text:h text:style-name="P41" text:outline-level="2"><text:bookmark-start text:name="__RefHeading___Toc3695_1729350629"/><text:soft-page-break/><text:span text:style-name="Strong_20_Emphasis"><text:span text:style-name="T60">2.2 Theoretical Review and Conceptual Framework</text:span></text:span><text:bookmark-end text:name="__RefHeading___Toc3695_1729350629"/></text:h>
      <text:p text:style-name="P4"><text:span text:style-name="T13">This section critically examines the empirical and theoretical literature underpinning the central problem and the proposed solution. It is structured around the key variables hypothesized to influence connection quality and user well-being in digital dating: the </text:span><text:span text:style-name="Strong_20_Emphasis"><text:span text:style-name="T13">Interface Design Paradigm</text:span></text:span><text:span text:style-name="T13">, </text:span><text:span text:style-name="Strong_20_Emphasis"><text:span text:style-name="T13">Choice Architecture</text:span></text:span><text:span text:style-name="T13">, and the </text:span><text:span text:style-name="Strong_20_Emphasis"><text:span text:style-name="T13">Primacy of Visual Information</text:span></text:span><text:span text:style-name="T13">. By analysing prior research on these variables, a conceptual framework is developed to guide the analysis of the proposed experience-centric model.</text:span></text:p>
      <text:h text:style-name="P48" text:outline-level="3"><text:bookmark-start text:name="__RefHeading___Toc5411_3375418934"/><text:span text:style-name="Strong_20_Emphasis"><text:span text:style-name="T60">2.2.1 The Influence of Interface Design Paradigm on Social Interaction</text:span></text:span><text:bookmark-end text:name="__RefHeading___Toc5411_3375418934"/></text:h>
      <text:p text:style-name="P21"><text:bookmark-start text:name="__RefHeading___Toc5413_3375418934"/><text:span text:style-name="T13">The dominant "swipe" interface represents a specific design paradigm with profound implications for social behavior. This paradigm can be theorized through the lens of </text:span><text:span text:style-name="Strong_20_Emphasis"><text:span text:style-name="T13">Social Information Processing (SIP) theory</text:span></text:span><text:span text:style-name="T13"> (Walther 1992), which suggests that while computer-mediated communication (CMC) users adapt to reduced social cues, they eventually develop impressions and relationships, albeit at a slower pace. However, the swipe model deliberately accelerates this process to an extreme, forcing hyper-rapid, cue-impoverished judgments based primarily on photographs, thereby subverting the natural adaptation process described by SIP (Sharabi and Timmerman 2020).</text:span><text:bookmark-end text:name="__RefHeading___Toc5413_3375418934"/></text:p>
      <text:p text:style-name="P4"><text:span text:style-name="T13">Empirically, researchers have linked this gamified, high-velocity interface to the </text:span><text:span text:style-name="Strong_20_Emphasis"><text:span text:style-name="T13">commodification</text:span></text:span><text:span text:style-name="T13"> of potential partners. Lenton, Fasolo and Todd (2008, p. 93) argue that such environments encourage a "shopping mentality," where individuals are evaluated like consumer products. This is exacerbated by design features like infinite scroll and mutual opt-in gates (swiping), which mirror slot-machine mechanics and trigger variable reinforcement schedules, a powerful driver of addictive behavior (Schüll 2014). The methodological approach here often involves experimental surveys and longitudinal studies measuring user attitudes and self-reported behaviors (e.g., Timmerman and Courtois 2018). A significant gap exists, however, in applied research that designs and tests alternative interface paradigms not based on rapid, </text:span><text:soft-page-break/><text:span text:style-name="T13">binary assessment, which directly informs </text:span><text:span text:style-name="Strong_20_Emphasis"><text:span text:style-name="T13">Research Question 2</text:span></text:span><text:span text:style-name="T13"> on integrating UX and psychology.</text:span></text:p>
      <text:h text:style-name="P46" text:outline-level="3"><text:bookmark-start text:name="__RefHeading___Toc3807_1729350629"/><text:span text:style-name="Strong_20_Emphasis"><text:span text:style-name="T60">2.2.2 Choice Architecture and the Paradox of Choice</text:span></text:span><text:bookmark-end text:name="__RefHeading___Toc3807_1729350629"/></text:h>
      <text:p text:style-name="P21"><text:bookmark-start text:name="__RefHeading___Toc3809_1729350629"/><text:span text:style-name="T13">A core variable influencing user satisfaction is the architecture of choice presented by the platform. This draws directly from Schwartz's (2004) theory of the </text:span><text:span text:style-name="Strong_20_Emphasis"><text:span text:style-name="T13">paradox of choice</text:span></text:span><text:span text:style-name="T13">, which posits that an overabundance of options leads to anxiety, decision paralysis, and post-decision regret. In digital dating, the "massive but ambiguous" choice set is a defining feature (Heino, Ellison and Gibbs 2010, p. 430).</text:span><text:bookmark-end text:name="__RefHeading___Toc3809_1729350629"/></text:p>
      <text:p text:style-name="P4"><text:span text:style-name="T13">Empirical studies support this linkage. Using survey methodology, D’Angelo and Toma (2016) found that users facing larger choice sets reported lower satisfaction and greater difficulty choosing, often engaging in "relationshopping"—continually searching for a better option rather than investing in a current match. This creates a market-like dynamic where commitment is devalued. Most research has focused on quantifying this effect within existing apps, employing user experience (UX) surveys and log-data analysis (Rosenfeld, Thomas and Hausen 2019). A clear gap is experimental research on systems that structurally limit or re-contextualise choice—for example, by making the primary choice an activity rather than a person—which this project aims to address, linking to </text:span><text:span text:style-name="Strong_20_Emphasis"><text:span text:style-name="T13">Research Question 4</text:span></text:span><text:span text:style-name="T13"> on evaluating the new model’s impact on engagement and satisfaction.</text:span></text:p>
      <text:h text:style-name="P46" text:outline-level="3"><text:bookmark-start text:name="__RefHeading___Toc3701_1729350629"/><text:span text:style-name="Strong_20_Emphasis"><text:span text:style-name="T60">2.2.3 The Primacy of Visual Information</text:span></text:span><text:bookmark-end text:name="__RefHeading___Toc3701_1729350629"/></text:h>
      <text:p text:style-name="P6"><text:span text:style-name="T13">The variable of </text:span><text:span text:style-name="Strong_20_Emphasis"><text:span text:style-name="T13">visual primacy</text:span></text:span><text:span text:style-name="T13"> is critical in understanding superficiality. The design mandates that a photograph is the first and often only filter, drawing on theories of </text:span><text:span text:style-name="Strong_20_Emphasis"><text:span text:style-name="T13">impression formation</text:span></text:span><text:span text:style-name="T13"> where initial cues disproportionately shape final judgments (Asch 1946). In digital contexts, this leads to a reliance on homophily based on appearance and intense curation of one's visual profile (Ranzini and Lutz 2016).</text:span></text:p>
      <text:p text:style-name="P4"><text:span text:style-name="T13">Empirical work by Hancock and Toma (2009) using content analysis of profiles demonstrated significant discrepancies between online self-presentation and reality, noting that users engage in selective self-presentation, often "enhancing" their </text:span><text:soft-page-break/><text:span text:style-name="T13">attractiveness. This fosters an environment of mistrust and objectification. Research methodologies here include profile analysis, experiments manipulating profile photo attractiveness, and studies on self-objectification (Strubel and Petrie 2020). The identified gap is in designing systems that can </text:span><text:span text:style-name="Strong_20_Emphasis"><text:span text:style-name="T13">delay or contextualise visual cues</text:span></text:span><text:span text:style-name="T13"> to allow other dimensions of personality (e.g., values, communication style) to form initial impressions, a core hypothesis tested by this project's deferred photo-reveal mechanism, directly relevant to </text:span><text:span text:style-name="Strong_20_Emphasis"><text:span text:style-name="T13">Research Question 1</text:span></text:span><text:span text:style-name="T13"> on user-identified needs for authenticity.</text:span></text:p>
      <text:h text:style-name="P48" text:outline-level="3"><text:bookmark-start text:name="__RefHeading___Toc5415_3375418934"/><text:span text:style-name="Strong_20_Emphasis"><text:span text:style-name="T60">2.2.4 Conceptual Framework</text:span></text:span><text:bookmark-end text:name="__RefHeading___Toc5415_3375418934"/></text:h>
      <text:p text:style-name="P115"><text:bookmark-start text:name="__RefHeading___Toc5417_3375418934"/><text:span text:style-name="T4">The synthesized literature informs the following conceptual framework, which illustrates the hypothesized causal pathways of the traditional model and the proposed intervention point for the "</text:span><text:span text:style-name="T7">lomu</text:span><text:span text:style-name="T4">" solution.</text:span><text:bookmark-end text:name="__RefHeading___Toc5417_3375418934"/></text:p>
      <text:p text:style-name="P4"><text:span text:style-name="Strong_20_Emphasis"><text:span text:style-name="T22">(A) Traditional Swipe-Based Model:</text:span></text:span></text:p>
      <text:list text:style-name="L8">
        <text:list-item>
          <text:p text:style-name="P56"><text:span text:style-name="Strong_20_Emphasis"><text:span text:style-name="T13">Independent Variable:</text:span></text:span><text:span text:style-name="T13"> Interface Design (Swipe/Gamified, Infinite Choice, Visual Primacy).</text:span></text:p>
        </text:list-item>
        <text:list-item>
          <text:p text:style-name="P56"><text:span text:style-name="Strong_20_Emphasis"><text:span text:style-name="T13">Intervening Variables:</text:span></text:span><text:span text:style-name="T13"> Leads to User Behavior characterized by Rapid Judgement, Commodification Mentality, and Profile Curation.</text:span></text:p>
        </text:list-item>
        <text:list-item>
          <text:p text:style-name="P56"><text:span text:style-name="Strong_20_Emphasis"><text:span text:style-name="T13">Dependent Variables:</text:span></text:span><text:span text:style-name="T13"> Resulting in Outcomes of Low-Quality Connections, User Burnout, and Superficial Interactions.</text:span></text:p>
        </text:list-item>
      </text:list>
      <text:p text:style-name="P4"><text:span text:style-name="Strong_20_Emphasis"><text:span text:style-name="T22">(B) Proposed Experience-Centric Intervention:</text:span></text:span></text:p>
      <text:list text:style-name="L9">
        <text:list-item>
          <text:p text:style-name="P57"><text:span text:style-name="Strong_20_Emphasis"><text:span text:style-name="T13">Independent Variable:</text:span></text:span><text:span text:style-name="T13"> Interface Design (Event-Based, Constrained Choice, Deferred Visuals).</text:span></text:p>
        </text:list-item>
        <text:list-item>
          <text:p text:style-name="P57"><text:span text:style-name="Strong_20_Emphasis"><text:span text:style-name="T13">Hypothesized Intervening Variables:</text:span></text:span><text:span text:style-name="T13"> Leads to User Behavior characterized by Investment in Shared Activity, Personality-First Engagement, and Reduced Comparison.</text:span></text:p>
        </text:list-item>
        <text:list-item>
          <text:p text:style-name="P57"><text:span text:style-name="Strong_20_Emphasis"><text:span text:style-name="T22">Hypothesized Dependent Variables:</text:span></text:span><text:span text:style-name="T22"> </text:span><text:span text:style-name="T13">Anticipated to yield Outcomes of More Authentic Connections, Higher User Satisfaction, and Reduced Burnout.</text:span></text:p>
        </text:list-item>
      </text:list>
      <text:p text:style-name="P4"><text:soft-page-break/><text:span text:style-name="T13">The framework posits that by manipulating the key independent variable of </text:span><text:span text:style-name="Strong_20_Emphasis"><text:span text:style-name="T13">Interface Design</text:span></text:span><text:span text:style-name="T13"> away from the traits in Path (A) and towards those in Path (B), the project can positively influence the intervening behavioral variables and, ultimately, the key outcome variables of connection quality and user well-being. This framework will guide the system design and the evaluation of the prototype.</text:span></text:p>
      <text:h text:style-name="P45" text:outline-level="3" text:is-list-header="true"><text:span text:style-name="Strong_20_Emphasis"><text:span text:style-name="T30"/></text:span></text:h>
      <text:h text:style-name="P41" text:outline-level="2"><text:bookmark-start text:name="__RefHeading___Toc3705_1729350629"/><text:span text:style-name="Strong_20_Emphasis"><text:span text:style-name="T60">2.3 Critique of the Existing Literature</text:span></text:span><text:bookmark-end text:name="__RefHeading___Toc3705_1729350629"/></text:h>
      <text:p text:style-name="P1"><text:span text:style-name="Strong_20_Emphasis"><text:span text:style-name="T49"/></text:span></text:p>
      <text:p text:style-name="P97">The preceding review establishes a robust empirical and theoretical consensus on the negative psychosocial impacts of the swipe-based dating model, particularly concerning choice overload, visual primacy, and commodification. However, a critical analysis reveals two significant limitations in the existing body of literature, which this study seeks to address.</text:p>
      <text:p text:style-name="P1"><text:span text:style-name="T13">Firstly, there is a pronounced </text:span><text:span text:style-name="Strong_20_Emphasis"><text:span text:style-name="T13">methodological and conceptual gap between </text:span></text:span><text:span text:style-name="Strong_20_Emphasis"><text:span text:style-name="T31">detailed analysis</text:span></text:span><text:span text:style-name="Strong_20_Emphasis"><text:span text:style-name="T13"> and constructive design</text:span></text:span><text:span text:style-name="T13">. The literature is overwhelmingly diagnostic. Studies excel at employing surveys (D’Angelo and Toma 2016), profile analyses (Hancock and Toma 2009), and theoretical frameworks (Schwartz 2004; Walther 1992) to deconstruct the problems inherent in platforms like Tinder. Yet, this research largely stops at the point of critique. There is a scarcity of applied, interventionist studies that move beyond identifying the negative effects of "visual primacy" or the "paradox of choice" to actively design, implement, and test alternative digital architectures intended to mitigate these effects. The work of scholars like Schüll (2014) on addictive design is used to explain user retention but is seldom applied to proactively design for healthier engagement. This leaves a gap where the compelling critique of the dominant paradigm is not matched by empirically tested, novel design frameworks, which is the central undertaking of this project.</text:span></text:p>
      <text:p text:style-name="P1"><text:span text:style-name="T13">Secondly, the literature exhibits a </text:span><text:span text:style-name="Strong_20_Emphasis"><text:span text:style-name="T13">constrained imagination regarding viable alternatives</text:span></text:span><text:span text:style-name="T13">. When alternatives are explored, they frequently remain within the fundamental profile-swipe paradigm, focusing on incremental modifications such as more detailed profiles, different matching algorithms, or slight alterations to </text:span><text:soft-page-break/><text:span text:style-name="T13">interaction rules (e.g., women messaging first). While valuable, these approaches accept the core premise that dating apps are primarily about profiling and selecting individuals from a catalogue. There is limited rigorous exploration of models that fundamentally redefine the unit of connection—for instance, from a </text:span><text:span text:style-name="Emphasis"><text:span text:style-name="T13">person</text:span></text:span><text:span text:style-name="T13"> to a </text:span><text:span text:style-name="Emphasis"><text:span text:style-name="T13">shared activity or context</text:span></text:span><text:span text:style-name="T13">. This suggests an industry and academic bias towards optimizing an established, commercially successful model rather than challenging its foundational assumptions. The proposed experience-centric model of "</text:span><text:span text:style-name="T32">lomu</text:span><text:span text:style-name="T13">" directly confronts this limitation by testing a premise that is often discussed in theory—reducing superficiality by delaying visual cues and prioritising shared context—but remains critically under-evaluated in practice.</text:span></text:p>
      <text:p text:style-name="P97">In conclusion, while the existing literature provides an essential foundation by rigorously validating the problem space, it simultaneously highlights its own limitation: a lack of translational research that bridges critical social science theory with innovative Human-Computer Interaction (HCI) design to propose and evaluate substantively different solutions. This project positions itself to contribute directly to this gap, using the established critiques as design requirements to engineer and assess a novel connection model.</text:p>
      <text:p text:style-name="P97"><text:span text:style-name="T55"/></text:p>
      <text:h text:style-name="P41" text:outline-level="2"><text:bookmark-start text:name="__RefHeading___Toc3707_1729350629"/><text:span text:style-name="Strong_20_Emphasis"><text:span text:style-name="T60">2.4 Summary</text:span></text:span><text:bookmark-end text:name="__RefHeading___Toc3707_1729350629"/></text:h>
      <text:p text:style-name="P100">This literature review has established a critical foundation for the research project. It began by tracing the evolution of digital dating to the current dominant paradigm: the gamified, swipe-based interface characterized by infinite choice and visual primacy. Drawing on interdisciplinary theories such as Social Information Processing, the Paradox of Choice, and Impression Formation, the review synthesized empirical evidence demonstrating that this specific design architecture leads to measurable negative outcomes. These include user behaviors like commodification and profile curation, which ultimately result in psychological fatigue, superficial interactions, and diminished connection quality. While the review acknowledged minor iterations within the industry, it argued that most so-called alternatives remain constrained within the fundamental profile-browsing paradigm. The conceptual framework derived from this analysis clearly maps the causal pathway from interface design <text:soft-page-break/>choices to user outcomes, thereby precisely defining the variables that the proposed "<text:span text:style-name="T59">lomu</text:span>" model seeks to influence.</text:p>
      <text:h text:style-name="P39" text:outline-level="2"><text:bookmark-start text:name="__RefHeading___Toc3709_1729350629"/>2.5 Research Gaps<text:bookmark-end text:name="__RefHeading___Toc3709_1729350629"/></text:h>
      <text:p text:style-name="P101">The critique of the literature reveals two primary research gaps that this project aims to address:</text:p>
      <text:h text:style-name="Heading_20_3" text:outline-level="3"><text:bookmark-start text:name="__RefHeading___Toc6319_3375418934"/><text:span text:style-name="Strong_20_Emphasis"><text:span text:style-name="T53">2.5.1 </text:span></text:span><text:span text:style-name="Strong_20_Emphasis"><text:span text:style-name="T52">The Translational Design Gap:</text:span></text:span><text:span text:style-name="T52"> </text:span><text:bookmark-end text:name="__RefHeading___Toc6319_3375418934"/></text:h>
      <text:list xml:id="list2319833324" text:style-name="L10">
        <text:list-header>
          <text:p text:style-name="P58"><text:span text:style-name="T36">There is a significant disconnect between the robust diagnostic critique of existing dating apps and the development of empirically tested, alternative design frameworks. While ample research identifies the problems caused by visual primacy and choice overload (e.g., D’Angelo and Toma 2016; Strubel and Petrie 2020), there is a scarcity of applied studies that use these insights as direct inputs to design, implement, and evaluate a functional system based on opposing principles. The literature is strong on the "what is wrong" but notably weak on the "how to build it differently and does it work."</text:span></text:p>
        </text:list-header>
      </text:list>
      <text:h text:style-name="Heading_20_3" text:outline-level="3"><text:bookmark-start text:name="__RefHeading___Toc6321_3375418934"/><text:span text:style-name="Strong_20_Emphasis"><text:span text:style-name="T53">2.5.2 </text:span></text:span><text:span text:style-name="Strong_20_Emphasis"><text:span text:style-name="T52">The Paradigm Innovation Gap:</text:span></text:span><text:span text:style-name="T36"> </text:span><text:bookmark-end text:name="__RefHeading___Toc6321_3375418934"/></text:h>
      <text:list text:continue-numbering="true" text:style-name="L10">
        <text:list-header>
          <text:p text:style-name="P58"><text:span text:style-name="T36">Current research exhibits a constrained exploration of viable alternatives that break fundamentally from the profile-as-catalogue metaphor. Scholarly and commercial efforts predominantly focus on optimizing the existing model (e.g., better algorithms, richer profiles) rather than questioning its core unit of connection. A critical gap exists in the rigorous investigation of models that shift the primary interaction from evaluating </text:span><text:span text:style-name="Emphasis"><text:span text:style-name="T36">individuals</text:span></text:span><text:span text:style-name="T36"> to coordinating </text:span><text:span text:style-name="Emphasis"><text:span text:style-name="T36">shared experiences or activities</text:span></text:span><text:span text:style-name="T36">. Specifically, there is a lack of empirical research on systems that intentionally delay the revelation of visual cues to facilitate personality-first impression formation, a central tenet of the proposed solution. This project will directly contribute to this gap by developing and testing an experience-centric connection mode</text:span><text:span text:style-name="T43">l.</text:span></text:p>
        </text:list-header>
      </text:list>
      <text:p text:style-name="P104">CHAPTER THREE: SYSTEM ANALYSIS AND DESIGN</text:p>
      <text:h text:style-name="P39" text:outline-level="2"><text:bookmark-start text:name="__RefHeading___Toc3811_1729350629"/><text:span text:style-name="T65">3.1 </text:span>Introduction<text:bookmark-end text:name="__RefHeading___Toc3811_1729350629"/></text:h>
      <text:p text:style-name="P77"><text:span text:style-name="T41">This chapter translates the theoretical foundation and research gaps identified in the literature review into a concrete, actionable design for the "</text:span><text:span text:style-name="T42">lomu</text:span><text:span text:style-name="T41">" application. It moves from diagnosing the problems of the existing paradigm to prescribing a detailed systemic solution. The primary objective of this chapter is to define the functional and non-functional requirements of the system and to architect a user experience that </text:span><text:span text:style-name="T42">put in use</text:span><text:span text:style-name="T41"> the core hypothesis: that an experience-centric model with deferred visual judgment can foster more authentic connections.</text:span></text:p>
      <text:p text:style-name="P77"><text:span text:style-name="T41"/></text:p>
      <text:p text:style-name="P77"><text:span text:style-name="T13">The chapter is structured to reflect a systematic design process. First, it establishes the </text:span><text:span text:style-name="Strong_20_Emphasis"><text:span text:style-name="T13">Software Development Methodology</text:span></text:span><text:span text:style-name="T13"> that will govern the project's life-cycle, ensuring a structured and iterative approach to building and refining the prototype. Next, it conducts a comprehensive </text:span><text:span text:style-name="Strong_20_Emphasis"><text:span text:style-name="T13">Requirements Analysis</text:span></text:span><text:span text:style-name="T13">, deriving both functional specifications (what the system must do) and non-functional specifications (how the system should perform) directly from the research objectives and user needs articulated earlier. Following this, the </text:span><text:span text:style-name="Strong_20_Emphasis"><text:span text:style-name="T13">System Design</text:span></text:span><text:span text:style-name="T13"> section will detail the high-level architecture, including the technology stack and data flow, providing a blueprint for implementation. Finally, the chapter will present the </text:span><text:span text:style-name="Strong_20_Emphasis"><text:span text:style-name="T13">User Interface (UI) and User Experience (UX) Design</text:span></text:span><text:span text:style-name="T13">, showcasing key screen mock-ups and interactive workflows that embody the experience-centric philosophy, such as the event feed, the blurred profile mechanic, and the pre-event coordination chat.</text:span></text:p>
      <text:p text:style-name="P77"><text:span text:style-name="T13"/></text:p>
      <text:p text:style-name="P77"><text:span text:style-name="T13">This chapter serves as the crucial bridge between the conceptual research framework and the practical implementation to follow, ensuring that every design decision is traceable back to the goal of mitigating the specific issues of superficiality, choice overload, and user burnout.</text:span></text:p>
      <text:h text:style-name="P43" text:outline-level="2"><text:bookmark-start text:name="__RefHeading___Toc5419_3375418934"/><text:span text:style-name="Strong_20_Emphasis"><text:span text:style-name="T60">3.2 Systems Development Methodology</text:span></text:span><text:bookmark-end text:name="__RefHeading___Toc5419_3375418934"/></text:h>
      <text:p text:style-name="P21"><text:bookmark-start text:name="__RefHeading___Toc5421_3375418934"/><text:span text:style-name="T13">This project will adopt an </text:span><text:span text:style-name="Strong_20_Emphasis"><text:span text:style-name="T13">Adaptive Hybrid Methodology</text:span></text:span><text:span text:style-name="T13">, primarily combining principles from the </text:span><text:span text:style-name="Strong_20_Emphasis"><text:span text:style-name="T13">Agile</text:span></text:span><text:span text:style-name="T13"> framework, specifically </text:span><text:span text:style-name="Strong_20_Emphasis"><text:span text:style-name="T13">Scrum</text:span></text:span><text:span text:style-name="T13">, with a structured initial </text:span><text:soft-page-break/><text:span text:style-name="T13">phase inspired by </text:span><text:span text:style-name="Strong_20_Emphasis"><text:span text:style-name="T13">Prototyping</text:span></text:span><text:span text:style-name="T13">. This approach is selected to align with the research-oriented, iterative, and user-focused nature of the project, ensuring both flexibility and tangible progress within the constrained eight-month timeline.</text:span><text:bookmark-end text:name="__RefHeading___Toc5421_3375418934"/></text:p>
      <text:p text:style-name="P96">The methodology will be structured in two overarching phases:</text:p>
      <text:list text:style-name="L11">
        <text:list-item>
          <text:p text:style-name="P59"><text:span text:style-name="Strong_20_Emphasis"><text:span text:style-name="T22">Structured Design and Planning Phase:</text:span></text:span><text:span text:style-name="T22"> </text:span><text:span text:style-name="T13">An initial, time-boxed period will be dedicated to comprehensive requirements analysis, architectural design, and the creation of high-fidelity UI/UX prototypes (detailed in Sections 3.3 and 3.4). This phase is crucial for establishing a clear research-based design direction and a stable system blueprint before development begins, reducing the risk of foundational changes during implementation.</text:span></text:p>
        </text:list-item>
        <text:list-item>
          <text:p text:style-name="P60"><text:span text:style-name="Strong_20_Emphasis"><text:span text:style-name="T22">Iterative Development and Evaluation Phase:</text:span></text:span><text:span text:style-name="T13"> Following the design phase, the project will transition into an Agile Scrum mode for the implementation of the functional prototype. Work will be organized into a series of </text:span><text:span text:style-name="Strong_20_Emphasis"><text:span text:style-name="T13">two-week sprints</text:span></text:span><text:span text:style-name="T13">. Each sprint will aim to deliver a working, incrementally improved version of the application, focusing on a prioritized subset of features from the product backlog (derived from the functional requirements). The conclusion of each sprint will involve a </text:span><text:span text:style-name="Strong_20_Emphasis"><text:span text:style-name="T13">Sprint Review</text:span></text:span><text:span text:style-name="T13"> to demonstrate the working software and a </text:span><text:span text:style-name="Strong_20_Emphasis"><text:span text:style-name="T13">Sprint Retrospective</text:span></text:span><text:span text:style-name="T13"> to adapt the process.</text:span></text:p>
        </text:list-item>
      </text:list>
      <text:p text:style-name="P96">This hybrid model is explicitly chosen for its suitability to the project's goals:</text:p>
      <text:list text:style-name="L12">
        <text:list-item>
          <text:p text:style-name="P61"><text:span text:style-name="Strong_20_Emphasis"><text:span text:style-name="T22">Research Alignment:</text:span></text:span><text:span text:style-name="T22"> </text:span><text:span text:style-name="T13">The initial design phase ensures the system is firmly grounded in the theoretical framework, while the iterative sprints allow for continuous integration of findings from user testing (e.g., A/B testing of the blur mechanic, feedback on the event creation flow).</text:span></text:p>
        </text:list-item>
        <text:list-item>
          <text:p text:style-name="P61"><text:span text:style-name="Strong_20_Emphasis"><text:span text:style-name="T22">Risk Mitigation:</text:span></text:span><text:span text:style-name="T13"> Early prototyping of core interactions (like the blurred profile reveal) allows for validation of the key research concepts before significant development effort is expended.</text:span></text:p>
        </text:list-item>
        <text:list-item>
          <text:p text:style-name="P61"><text:span text:style-name="Strong_20_Emphasis"><text:span text:style-name="T22">Measurable Progress:</text:span></text:span><text:span text:style-name="T22"> </text:span><text:span text:style-name="T13">The time-boxed sprints provide a regular cadence for achieving the project's specific objectives, ensuring the prototype evolves measurably and consistently toward the final evaluation milestone.</text:span></text:p>
        </text:list-item>
        <text:list-item>
          <text:p text:style-name="P61"><text:soft-page-break/><text:span text:style-name="Strong_20_Emphasis"><text:span text:style-name="T22">Adaptability:</text:span></text:span><text:span text:style-name="T22"> </text:span><text:span text:style-name="T13">The Agile component allows the team to respond to unforeseen technical challenges or insightful user feedback gathered during testing without derailing the overall project plan.</text:span></text:p>
        </text:list-item>
      </text:list>
      <text:p text:style-name="P2"><text:span text:style-name="T13">The methodology will be managed using standard Agile tools: a </text:span><text:span text:style-name="Strong_20_Emphasis"><text:span text:style-name="T13">product backlog</text:span></text:span><text:span text:style-name="T13"> for requirements, a </text:span><text:span text:style-name="Strong_20_Emphasis"><text:span text:style-name="T13">sprint backlog</text:span></text:span><text:span text:style-name="T13"> for short-term tasks, and a </text:span><text:span text:style-name="Strong_20_Emphasis"><text:span text:style-name="T13">burndown chart</text:span></text:span><text:span text:style-name="T13"> to track progress. This structured yet flexible approach is designed to successfully deliver a testable, functional prototype that is both a software product and a primary research artifact.</text:span></text:p>
      <text:h text:style-name="P44" text:outline-level="2"><text:bookmark-start text:name="__RefHeading___Toc5431_3375418934"/><text:span text:style-name="Strong_20_Emphasis"><text:span text:style-name="T60">3.3 Feasibility Study</text:span></text:span><text:bookmark-end text:name="__RefHeading___Toc5431_3375418934"/></text:h>
      <text:p text:style-name="P115"><text:span text:style-name="T4">A feasibility study assesses the practicality and viability of the proposed "</text:span><text:span text:style-name="T8">lomu</text:span><text:span text:style-name="T4">" project from multiple critical dimensions. This analysis confirms that the project is feasible and can be successfully completed within the allotted eight-month time-frame and available resources.</text:span></text:p>
      <text:h text:style-name="P49" text:outline-level="3"><text:bookmark-start text:name="__RefHeading___Toc3813_1729350629"/>3.3.1 Technical Feasibility<text:bookmark-end text:name="__RefHeading___Toc3813_1729350629"/></text:h>
      <text:p text:style-name="P109">The project utilizes a well-established and accessible technology stack, minimizing technical risk. The front-end can be developed using a cross-platform framework React Native, allowing for a single code-base to be deployed on both iOS and Android for testing purposes. The back-end can be built with a lightweight Node.js framework, with a MongoDB for structured data. Core features—user authentication, event listings, real-time chat, and image blurring—leverage common, well-documented libraries and APIs (e.g., MongoDB, Cloudinary for chat, image processing libraries for blur effects). No proprietary or experimental technology is required, ensuring development can proceed using widely available knowledge and tools.</text:p>
      <text:h text:style-name="P46" text:outline-level="3"><text:bookmark-start text:name="__RefHeading___Toc3815_1729350629"/><text:span text:style-name="Strong_20_Emphasis"><text:span text:style-name="T50">3.3.</text:span></text:span><text:span text:style-name="Strong_20_Emphasis"><text:span text:style-name="T22">2 Economic Feasibility </text:span></text:span><text:bookmark-end text:name="__RefHeading___Toc3815_1729350629"/></text:h>
      <text:p text:style-name="P114"><text:span text:style-name="T4">As a research and development prototype, the project requires minimal financial investment. The primary costs are developer time (provided by the researcher/student) and standard software tools, most of which are free for academic or small-scale use (e.g., IDEs, GitHub). Hosting for testing can be done affordably using cloud service </text:span><text:soft-page-break/><text:span text:style-name="T4">tiers (e.g., </text:span><text:span text:style-name="T9">onRender</text:span><text:span text:style-name="T4">). There are no costs associated with user acquisition for testing, as participants will be recruited voluntarily from target demographics. The project is therefore highly economical within an academic budget.</text:span></text:p>
      <text:h text:style-name="P46" text:outline-level="3"><text:bookmark-start text:name="__RefHeading___Toc3817_1729350629"/><text:span text:style-name="Strong_20_Emphasis"><text:span text:style-name="T50">3.3.</text:span></text:span><text:span text:style-name="Strong_20_Emphasis"><text:span text:style-name="T22">3 Operational Feasibility</text:span></text:span><text:bookmark-end text:name="__RefHeading___Toc3817_1729350629"/></text:h>
      <text:p text:style-name="P98">The prototype is designed to be operated and tested within a controlled environment. Deployment will target a limited number of test users (e.g., 20-50 participants) via a closed beta distribution method (e.g.,internal APK for Android). The core operations—user on-boarding, event creation, matching, and chat—are discrete, manageable processes that can be monitored and debugged by a small team. The operational scope is deliberately constrained to proving the core concept, not supporting a public-scale application, making it fully manageable by a single developer or a small research group.</text:p>
      <text:h text:style-name="P46" text:outline-level="3"><text:bookmark-start text:name="__RefHeading___Toc3819_1729350629"/><text:span text:style-name="Strong_20_Emphasis"><text:span text:style-name="T50">3.3.</text:span></text:span><text:span text:style-name="Strong_20_Emphasis"><text:span text:style-name="T22">4. Scheduling Feasibility </text:span></text:span><text:bookmark-end text:name="__RefHeading___Toc3819_1729350629"/></text:h>
      <text:p text:style-name="P114"><text:span text:style-name="T4">The eight-month timeline is adequate for the project's scope. The Adaptive Hybrid Methodology is designed for this constraint: a 1-2 month initial phase for design and planning (Chapters 1-3), followed by 4-5 months of iterative sprints for development and integrated testing (Chapters 4-5), and a final 1-2 month period for formal user acceptance testing, evaluation, and documentation (Chapters 6-7). The specific objectives are designed to be sequential and incremental, ensuring steady progress toward the final </text:span><text:span text:style-name="T9">assessable </text:span><text:span text:style-name="T4">prototype.</text:span></text:p>
      <text:h text:style-name="P46" text:outline-level="3"><text:bookmark-start text:name="__RefHeading___Toc3821_1729350629"/><text:span text:style-name="Strong_20_Emphasis"><text:span text:style-name="T50">3.3.5 Feasibility </text:span></text:span><text:span text:style-name="Strong_20_Emphasis"><text:span text:style-name="T22">Conclusion</text:span></text:span><text:bookmark-end text:name="__RefHeading___Toc3821_1729350629"/></text:h>
      <text:p text:style-name="P22"><text:span text:style-name="T13">The "</text:span><text:span text:style-name="T33">lomu</text:span><text:span text:style-name="T13">" project is </text:span><text:span text:style-name="Strong_20_Emphasis"><text:span text:style-name="T13">highly feasible</text:span></text:span><text:span text:style-name="T13">. It leverages standard technologies, requires minimal financial outlay, operates within a manageable and controlled scope, and fits logically within the proposed timeline and methodology. The primary identified risk is not technical impossibility, but scope creep; this is mitigated by the clear, research-focused objectives and the time-boxed Agile sprints. Therefore, proceeding with the project is a practical and justified undertaking.</text:span></text:p>
      <text:p text:style-name="P110"><text:span text:style-name="T4"/></text:p>
      <text:h text:style-name="P42" text:outline-level="2"><text:bookmark-start text:name="__RefHeading___Toc3832_1729350629"/><text:soft-page-break/><text:span text:style-name="Strong_20_Emphasis"><text:span text:style-name="T60">3.4 Requirements Elicitation: Data Collection</text:span></text:span><text:bookmark-end text:name="__RefHeading___Toc3832_1729350629"/></text:h>
      <text:p text:style-name="P21"><text:span text:style-name="T13">To derive authentic, user-centered system requirements, a mixed-method approach to data collection was employed. This approach combined </text:span><text:span text:style-name="Strong_20_Emphasis"><text:span text:style-name="T13">qualitative insights</text:span></text:span><text:span text:style-name="T13"> from semi-structured interviews with </text:span><text:span text:style-name="Strong_20_Emphasis"><text:span text:style-name="T13">quantifiable, broader trends</text:span></text:span><text:span text:style-name="T13"> from an online questionnaire. The data collection was focused exclusively on understanding user pain points with existing dating applications and gathering specific feature suggestions aligned with the research objectives, ensuring the elicited requirements directly addressed the problems of superficiality and burnout.</text:span></text:p>
      <text:h text:style-name="P5" text:outline-level="4"><text:bookmark-start text:name="__RefHeading___Toc3717_1729350629"/><text:span text:style-name="Strong_20_Emphasis"><text:span text:style-name="T22">1. Data Collection Tool A: Semi-Structured Interview Guide (Qualitative)</text:span></text:span><text:bookmark-end text:name="__RefHeading___Toc3717_1729350629"/></text:h>
      <text:list text:style-name="L13">
        <text:list-item>
          <text:p text:style-name="P62"><text:span text:style-name="Strong_20_Emphasis"><text:span text:style-name="T13">Tool Description &amp; Preparation:</text:span></text:span><text:span text:style-name="T13"> A flexible interview guide was developed with open-ended questions designed to explore participants' experiences, emotions, and unmet needs in depth. The guide was structured in three parts: (1) </text:span><text:span text:style-name="Strong_20_Emphasis"><text:span text:style-name="T13">Current Usage &amp; Habits</text:span></text:span><text:span text:style-name="T13">, (2) </text:span><text:span text:style-name="Strong_20_Emphasis"><text:span text:style-name="T13">Pain Points &amp; Negative Experiences</text:span></text:span><text:span text:style-name="T13">, and (3) </text:span><text:span text:style-name="Strong_20_Emphasis"><text:span text:style-name="T13">Ideation &amp; Desired Features</text:span></text:span><text:span text:style-name="T13">. It was prepared in a digital document for easy note-taking.</text:span></text:p>
        </text:list-item>
        <text:list-item>
          <text:p text:style-name="P62"><text:span text:style-name="Strong_20_Emphasis"><text:span text:style-name="T13">Administration:</text:span></text:span><text:span text:style-name="T13"> The guide was used to conduct </text:span><text:span text:style-name="Strong_20_Emphasis"><text:span text:style-name="T13">one-on-one, semi-structured interviews</text:span></text:span><text:span text:style-name="T13"> with 12 participants (6 male, 6 female), aged 23-35, who were active or lapsed users of mainstream dating apps (Tinder, Bumble, Hinge). Interviews were conducted online via video call, lasted approximately </text:span><text:span text:style-name="T34">10</text:span><text:span text:style-name="T13">-</text:span><text:span text:style-name="T34">1</text:span><text:span text:style-name="T13">5 minutes each. Probing questions were used to clarify and deepen responses.</text:span></text:p>
        </text:list-item>
      </text:list>
      <text:h text:style-name="P5" text:outline-level="4"><text:bookmark-start text:name="__RefHeading___Toc3719_1729350629"/><text:span text:style-name="Strong_20_Emphasis"><text:span text:style-name="T13">2. Data Collection Tool B: Online Questionnaire (Quantitative)</text:span></text:span><text:bookmark-end text:name="__RefHeading___Toc3719_1729350629"/></text:h>
      <text:list text:style-name="L14">
        <text:list-item>
          <text:p text:style-name="P63"><text:span text:style-name="Strong_20_Emphasis"><text:span text:style-name="T13">Tool Description &amp; Preparation:</text:span></text:span><text:span text:style-name="T13"> A structured questionnaire was designed using Google Forms. It consisted of four sections:</text:span></text:p>
          <text:list>
            <text:list-item>
              <text:p text:style-name="P64"><text:span text:style-name="Strong_20_Emphasis"><text:span text:style-name="T13">Demographic and Usage Screening.</text:span></text:span></text:p>
            </text:list-item>
            <text:list-item>
              <text:p text:style-name="P64"><text:span text:style-name="Strong_20_Emphasis"><text:span text:style-name="T13">Scaled Questions</text:span></text:span><text:span text:style-name="T13"> (5-point Likert scale) measuring agreement with statements about common pain points (e.g., "I feel judging profiles based on photos is superficial," "I often feel fatigued or burned out after using dating apps").</text:span></text:p>
            </text:list-item>
            <text:list-item>
              <text:p text:style-name="P64"><text:span text:style-name="Strong_20_Emphasis"><text:span text:style-name="T13">Ranking Exercises</text:span></text:span><text:span text:style-name="T13"> asking participants to prioritize potential new features (e.g., "Meeting through shared activities," "Anonymous chatting before seeing photos").</text:span></text:p>
            </text:list-item>
            <text:list-item>
              <text:p text:style-name="P64"><text:span text:style-name="Strong_20_Emphasis"><text:span text:style-name="T13">Open-ended questions</text:span></text:span><text:span text:style-name="T13"> for additional suggestions.</text:span></text:p>
            </text:list-item>
          </text:list>
        </text:list-item>
        <text:list-item>
          <text:p text:style-name="P64"><text:soft-page-break/><text:span text:style-name="Strong_20_Emphasis"><text:span text:style-name="T13">Administration:</text:span></text:span><text:span text:style-name="T13"> The questionnaire link was distributed through social media channels and university mailing lists targeting adults aged 21-40. A total of </text:span><text:span text:style-name="T35">87 </text:span><text:span text:style-name="Strong_20_Emphasis"><text:span text:style-name="T13">complete and valid responses</text:span></text:span><text:span text:style-name="T13"> were collected over a two-week period. The data was automatically collated in a spreadsheet for statistical analysis (frequency distributions, cross-tabulations) to identify predominant trends and validate themes from the interviews.</text:span></text:p>
        </text:list-item>
      </text:list>
      <text:p text:style-name="P4"><text:span text:style-name="Strong_20_Emphasis"><text:span text:style-name="T13">Supervisor Approval:</text:span></text:span><text:span text:style-name="T13"> Both the interview guide and the questionnaire draft were reviewed, refined, and formally approved by the project supervisor before any data collection commenced, ensuring alignment with ethical standards and research objectives.</text:span></text:p>
      <text:h text:style-name="P3" text:outline-level="4"><text:bookmark-start text:name="__RefHeading___Toc3721_1729350629"/><text:span text:style-name="Strong_20_Emphasis"><text:span text:style-name="T13">3. Relevance to Problem and Objectives</text:span></text:span><text:bookmark-end text:name="__RefHeading___Toc3721_1729350629"/></text:h>
      <text:p text:style-name="P96">The collected data was instrumental in translating the theoretical problems from the literature into concrete system requirements:</text:p>
      <text:list text:style-name="L15">
        <text:list-item>
          <text:p text:style-name="P65"><text:span text:style-name="Strong_20_Emphasis"><text:span text:style-name="T13">For Objective 1 (Investigate Limitations):</text:span></text:span><text:span text:style-name="T13"> Interview quotes and Likert scale data directly documented user frustration with superficial judgments ("It's like shopping for humans"), anxiety from choice overload, and the mental exhaustion of maintaining a curated profile.</text:span></text:p>
        </text:list-item>
        <text:list-item>
          <text:p text:style-name="P65"><text:span text:style-name="Strong_20_Emphasis"><text:span text:style-name="T13">For Objective 2 (Design System Architecture):</text:span></text:span><text:span text:style-name="T13"> User rankings and open-ended suggestions provided a clear priority list for features. The strong positive response to "meeting through shared activities" and "focusing on personality first" directly informed the core event-based matching and blurred profile mechanics of the Kismet design.</text:span></text:p>
        </text:list-item>
        <text:list-item>
          <text:p text:style-name="P66"><text:span text:style-name="Strong_20_Emphasis"><text:span text:style-name="T13">For System Requirements Elicitation:</text:span></text:span><text:span text:style-name="T13"> The data helped deduce specific functional needs, such as:</text:span></text:p>
          <text:list>
            <text:list-item>
              <text:p text:style-name="P65"><text:span text:style-name="Strong_20_Emphasis"><text:span text:style-name="T13">A non-swiping primary interface.</text:span></text:span></text:p>
            </text:list-item>
            <text:list-item>
              <text:p text:style-name="P65"><text:span text:style-name="Strong_20_Emphasis"><text:span text:style-name="T13">A mechanism to create and browse local activities/events.</text:span></text:span></text:p>
            </text:list-item>
            <text:list-item>
              <text:p text:style-name="P65"><text:span text:style-name="Strong_20_Emphasis"><text:span text:style-name="T13">A system to hide or obfuscate photos upon initial matching.</text:span></text:span></text:p>
            </text:list-item>
            <text:list-item>
              <text:p text:style-name="P65"><text:span text:style-name="Strong_20_Emphasis"><text:span text:style-name="T13">A mandatory pre-event group chat for coordination and ice-breaking.</text:span></text:span></text:p>
            </text:list-item>
          </text:list>
        </text:list-item>
      </text:list>
      <text:p text:style-name="P4"><text:soft-page-break/><text:span text:style-name="Strong_20_Emphasis"><text:span text:style-name="T13">Appendices:</text:span></text:span></text:p>
      <text:list text:style-name="L16">
        <text:list-item>
          <text:p text:style-name="P67"><text:span text:style-name="Strong_20_Emphasis"><text:span text:style-name="T13">Appendix A:</text:span></text:span><text:span text:style-name="T13"> Approved Semi-Structured Interview Guide and Participant Information Sheet.</text:span></text:p>
        </text:list-item>
        <text:list-item>
          <text:p text:style-name="P67"><text:span text:style-name="Strong_20_Emphasis"><text:span text:style-name="T13">Appendix B:</text:span></text:span><text:span text:style-name="T13"> Approved Online Questionnaire (Google Form structure and questions).</text:span></text:p>
        </text:list-item>
      </text:list>
      <text:p text:style-name="P111"><text:span text:style-name="T4"/></text:p>
      <text:h text:style-name="P41" text:outline-level="2"><text:bookmark-start text:name="__RefHeading___Toc3723_1729350629"/><text:span text:style-name="Strong_20_Emphasis"><text:span text:style-name="T60">3.5 Data and System Analysis</text:span></text:span><text:bookmark-end text:name="__RefHeading___Toc3723_1729350629"/></text:h>
      <text:p text:style-name="P112"><text:span text:style-name="T11">Analysis of the data collected from 87 survey respondents and 12 in-depth interviews provided statistically significant insights and validated the core hypotheses driving the "</text:span><text:span text:style-name="T12">lomu</text:span><text:span text:style-name="T11">" project. </text:span></text:p>
      <text:p text:style-name="P7"><text:span text:style-name="Strong_20_Emphasis"><text:span text:style-name="T36">Key Quantitative Findings:</text:span></text:span></text:p>
      <text:list text:style-name="L17">
        <text:list-item>
          <text:p text:style-name="P68"><text:span text:style-name="Strong_20_Emphasis"><text:span text:style-name="T36">Prevalence of Key Pain Points:</text:span></text:span><text:span text:style-name="T36"> A strong majority of respondents identified with the core problems of existing apps.</text:span></text:p>
          <text:list>
            <text:list-item>
              <text:p text:style-name="P69"><text:span text:style-name="Strong_20_Emphasis"><text:span text:style-name="T36">81.6%</text:span></text:span><text:span text:style-name="T36"> agreed or strongly agreed that judging profiles based primarily on photos feels superficial.</text:span></text:p>
            </text:list-item>
            <text:list-item>
              <text:p text:style-name="P69"><text:span text:style-name="Strong_20_Emphasis"><text:span text:style-name="T36">74.7%</text:span></text:span><text:span text:style-name="T36"> reported experiencing fatigue or burnout from using dating apps.</text:span></text:p>
            </text:list-item>
            <text:list-item>
              <text:p text:style-name="P69"><text:span text:style-name="Strong_20_Emphasis"><text:span text:style-name="T36">67.8%</text:span></text:span><text:span text:style-name="T36"> agreed that the endless choice of profiles makes it harder to commit to talking to one person.</text:span></text:p>
              <text:p text:style-name="P69"><text:span text:style-name="Emphasis"><text:span text:style-name="T36"/></text:span></text:p>
            </text:list-item>
          </text:list>
        </text:list-item>
        <text:list-item>
          <text:p text:style-name="P68"><text:span text:style-name="Strong_20_Emphasis"><text:span text:style-name="T36">Feature Prioritization:</text:span></text:span><text:span text:style-name="T36"> When asked to rank proposed features, "Meeting through a shared activity/event" was ranked as the </text:span><text:span text:style-name="Strong_20_Emphasis"><text:span text:style-name="T36">#1 or #2 most desired feature</text:span></text:span><text:span text:style-name="T36"> by 79% of respondents. "Having a chat before seeing the other person's full photo" was ranked in the top three by 68% of respondents.</text:span></text:p>
        </text:list-item>
      </text:list>
      <text:p text:style-name="P4"><text:span text:style-name="Strong_20_Emphasis"><text:span text:style-name="T36">Key Qualitative Themes (Thematic Analysis of Interviews):</text:span></text:span></text:p>
      <text:list text:style-name="L18">
        <text:list-item>
          <text:p text:style-name="P70"><text:span text:style-name="Strong_20_Emphasis"><text:span text:style-name="T36">Theme 1: Performance Anxiety:</text:span></text:span><text:span text:style-name="T36"> Users described profile creation as "creating a personal advert" and felt constant pressure to present a perfect, marketable image.</text:span></text:p>
        </text:list-item>
        <text:list-item>
          <text:p text:style-name="P70"><text:soft-page-break/><text:span text:style-name="Strong_20_Emphasis"><text:span text:style-name="T36">Theme 2: Transactional Interactions:</text:span></text:span><text:span text:style-name="T36"> Many described conversations as low-effort "interviews" that felt disposable, with one participant stating, "You're just another option in their queue."</text:span></text:p>
        </text:list-item>
        <text:list-item>
          <text:p text:style-name="P70"><text:span text:style-name="Strong_20_Emphasis"><text:span text:style-name="T36">Theme 3: Desire for Natural Context:</text:span></text:span><text:span text:style-name="T36"> Participants longed for interactions that felt more like "how you meet people in real life," citing shared hobbies or friends as a missing, trust-building layer. "If we're both going to the same concert, we already have something real to talk about," noted one interviewee.</text:span></text:p>
        </text:list-item>
      </text:list>
      <text:p text:style-name="P4"><text:span text:style-name="Strong_20_Emphasis"><text:span text:style-name="T36">System Analysis Conclusion:</text:span></text:span><text:span text:style-name="T36"> The data overwhelmingly supports the need for a paradigm shift. Users are dissatisfied with the current model's emphasis on appearance and infinite choice and explicitly desire a system built around shared activities and personality-first interaction. This analysis directly feeds the functional and non-functional requirements for the </text:span><text:span text:style-name="T37">lomu</text:span><text:span text:style-name="T36"> system.</text:span></text:p>
      <text:h text:style-name="P43" text:outline-level="2"><text:bookmark-start text:name="__RefHeading___Toc5427_3375418934"/><text:span text:style-name="Strong_20_Emphasis"><text:span text:style-name="T60">3.6 System Specification</text:span></text:span><text:bookmark-end text:name="__RefHeading___Toc5427_3375418934"/></text:h>
      <text:h text:style-name="P43" text:outline-level="2" text:is-list-header="true"><text:bookmark-start text:name="__RefHeading___Toc5429_3375418934"/><text:span text:style-name="T36">Based on the problem analysis, literature review, and user data, the following system specifications are defined.</text:span><text:bookmark-end text:name="__RefHeading___Toc5429_3375418934"/></text:h>
      <text:h text:style-name="P46" text:outline-level="3"><text:bookmark-start text:name="__RefHeading___Toc3823_1729350629"/><text:span text:style-name="Strong_20_Emphasis"><text:span text:style-name="T60">3.6.1 Functional Requirements</text:span></text:span><text:bookmark-end text:name="__RefHeading___Toc3823_1729350629"/></text:h>
      <text:list text:style-name="L19">
        <text:list-item>
          <text:p text:style-name="P102">The system shall allow users to create an account and profile containing a bio, interest tags, and at least one profile photo.</text:p>
        </text:list-item>
        <text:list-item>
          <text:p text:style-name="P102">The system shall provide a primary feed interface displaying user-generated local events/activities (title, description, date/time, location, interest tags).</text:p>
        </text:list-item>
        <text:list-item>
          <text:p text:style-name="P102">The system shall automatically create a dedicated group chat for all users who have joined an event, enabling pre-event coordination.</text:p>
        </text:list-item>
        <text:list-item>
          <text:p text:style-name="P102">The system shall allow users to view the full profiles (including unblurred photos) of fellow attendees after the Reveal Time.</text:p>
        </text:list-item>
        <text:list-item>
          <text:p text:style-name="P102">The system shall provide a post-event interface where users can privately indicate a mutual match with attendees they met.</text:p>
        </text:list-item>
      </text:list>
      <text:h text:style-name="P46" text:outline-level="3"><text:bookmark-start text:name="__RefHeading___Toc3825_1729350629"/><text:soft-page-break/><text:span text:style-name="Strong_20_Emphasis"><text:span text:style-name="T60">3.6.2 Non-Functional Requirements</text:span></text:span><text:bookmark-end text:name="__RefHeading___Toc3825_1729350629"/></text:h>
      <text:list text:style-name="L20">
        <text:list-item>
          <text:p text:style-name="P71"><text:span text:style-name="Strong_20_Emphasis"><text:span text:style-name="T36">Usability:</text:span></text:span><text:span text:style-name="T36"> The interface shall be intuitive enough for a user familiar with mainstream social apps to navigate without a tutorial. Task completion for core flows (creating an event, joining an event) shall have a success rate of &gt;95% in user testing.</text:span></text:p>
        </text:list-item>
        <text:list-item>
          <text:p text:style-name="P71"><text:span text:style-name="Strong_20_Emphasis"><text:span text:style-name="T36">Performance:</text:span></text:span><text:span text:style-name="T36"> The application shall load the main event feed in under 2 seconds on a standard 4G connection.</text:span></text:p>
        </text:list-item>
        <text:list-item>
          <text:p text:style-name="P71"><text:span text:style-name="Strong_20_Emphasis"><text:span text:style-name="T36">Security:</text:span></text:span><text:span text:style-name="T36"> User passwords shall be hashed and salted. Personal data (</text:span><text:span text:style-name="T37">paswaord</text:span><text:span text:style-name="T36">, messages) shall be transmitted over encrypted channels (HTTPS).</text:span></text:p>
        </text:list-item>
        <text:list-item>
          <text:p text:style-name="P71"><text:span text:style-name="Strong_20_Emphasis"><text:span text:style-name="T36">Reliability:</text:span></text:span><text:span text:style-name="T36"> The core match-joining and chat functionality shall have </text:span><text:span text:style-name="T38">89</text:span><text:span text:style-name="T36">% uptime during the testing period.</text:span></text:p>
        </text:list-item>
      </text:list>
      <text:h text:style-name="P41" text:outline-level="2" text:is-list-header="true"><text:bookmark-start text:name="__RefHeading___Toc3727_1729350629"/><text:span text:style-name="Strong_20_Emphasis"><text:span text:style-name="T60">3.7 System Modeling and Detailed Specification</text:span></text:span><text:bookmark-end text:name="__RefHeading___Toc3727_1729350629"/></text:h>
      <text:p text:style-name="P101">This section defines the application's behavior through precise input-output specifications and visual models.</text:p>
      <text:h text:style-name="P47" text:outline-level="3"><text:bookmark-start text:name="__RefHeading___Toc3827_1729350629"/><text:span text:style-name="Strong_20_Emphasis"><text:span text:style-name="T52">3.7.1 Input/Output Specification</text:span></text:span><text:bookmark-end text:name="__RefHeading___Toc3827_1729350629"/></text:h>
      <text:p text:style-name="P115">The application solves the problem of superficial digital connections by transforming user inputs related to interests and intentions into outputs that facilitate context-based matching.</text:p>
      <text:list text:style-name="L21">
        <text:list-item>
          <text:p text:style-name="P72"><text:span text:style-name="Strong_20_Emphasis"><text:span text:style-name="T36">Inputs Supplied by the User:</text:span></text:span></text:p>
          <text:list>
            <text:list-item>
              <text:p text:style-name="P73"><text:span text:style-name="Strong_20_Emphasis"><text:span text:style-name="T36">Profile Data:</text:span></text:span><text:span text:style-name="T36"> Bio text, selection of interest tags, upload of profile photo(s).</text:span></text:p>
            </text:list-item>
            <text:list-item>
              <text:p text:style-name="P73"><text:span text:style-name="Strong_20_Emphasis"><text:span text:style-name="T36">Event Data:</text:span></text:span><text:span text:style-name="T36"> Title, description, date </text:span><text:span text:style-name="T39">of birth, gender</text:span><text:span text:style-name="T36">, location, and associated interest tags when creating an activity.</text:span></text:p>
            </text:list-item>
            <text:list-item>
              <text:p text:style-name="P73"><text:span text:style-name="Strong_20_Emphasis"><text:span text:style-name="T36">Intent Signal:</text:span></text:span><text:span text:style-name="T36"> A "Join" action on an existing event.</text:span></text:p>
            </text:list-item>
          </text:list>
        </text:list-item>
      </text:list>
      <text:p text:style-name="P111"><text:span text:style-name="T11"/></text:p>
      <text:list text:continue-numbering="true" text:style-name="L21">
        <text:list-item>
          <text:p text:style-name="P72"><text:span text:style-name="Strong_20_Emphasis"><text:span text:style-name="T36">Outputs Produced by the Application:</text:span></text:span></text:p>
          <text:list>
            <text:list-item text:start-value="1">
              <text:p text:style-name="P73"><text:span text:style-name="Strong_20_Emphasis"><text:span text:style-name="T36">Curated Event Feed:</text:span></text:span><text:span text:style-name="T36"> A personalized list of upcoming activities, ranked by relevance to the user's interests and location.</text:span></text:p>
            </text:list-item>
            <text:list-item>
              <text:p text:style-name="P73"><text:soft-page-break/><text:span text:style-name="Strong_20_Emphasis"><text:span text:style-name="T36">Connection Context:</text:span></text:span><text:span text:style-name="T36"> A dedicated chat room and attendee list for each joined event, with photos initially blurred.</text:span></text:p>
            </text:list-item>
            <text:list-item>
              <text:p text:style-name="P73"><text:span text:style-name="Strong_20_Emphasis"><text:span text:style-name="T36">Reveal Output:</text:span></text:span><text:span text:style-name="T36"> Automatic un-blurring of attendee photos at the system-defined Reveal Time.</text:span></text:p>
            </text:list-item>
            <text:list-item>
              <text:p text:style-name="P73"><text:span text:style-name="Strong_20_Emphasis"><text:span text:style-name="T36">Post-Event Match Potential:</text:span></text:span><text:span text:style-name="T36"> A private interface showing other attendees from past events, with the ability to send a post-event match request.</text:span></text:p>
            </text:list-item>
          </text:list>
        </text:list-item>
      </text:list>
      <text:p text:style-name="P4"><text:span text:style-name="Strong_20_Emphasis"><text:span text:style-name="T36">3.7.2 System Models:</text:span></text:span></text:p>
      <text:p text:style-name="P4"><text:span text:style-name="Strong_20_Emphasis"><text:span text:style-name="T36">(A) Use Case Diagram:</text:span></text:span><text:span text:style-name="T36"><text:line-break/></text:span><text:span text:style-name="Emphasis"><text:span text:style-name="T36">(A use case diagram would be inserted here. Key actors: User, System. Key use cases: Register/Login, Create Event, Browse Event Feed, Join Event, Chat in Event Group, View Profiles (Blurred/Unblurred), Send Post-Event Match.)</text:span></text:span></text:p>
      <text:p text:style-name="P4"><text:span text:style-name="Strong_20_Emphasis"><text:span text:style-name="T36">(B) Core Data Flow Diagram (Level 0 - Context Diagram):</text:span></text:span><text:span text:style-name="T36"><text:line-break/></text:span><text:span text:style-name="Emphasis"><text:span text:style-name="T36">(A DFD would be inserted here. The central process is "</text:span></text:span><text:span text:style-name="Emphasis"><text:span text:style-name="T40">lomu</text:span></text:span><text:span text:style-name="Emphasis"><text:span text:style-name="T36"> Application." External entities: User. Key data flows: Profile Data, Event Data, Join Request IN to the process; Event Feed, Chat Messages, Match Notification OUT from the process to the User.)</text:span></text:span></text:p>
      <text:p text:style-name="P4"><text:span text:style-name="Strong_20_Emphasis"><text:span text:style-name="T36">(C) Entity-Relationship (ER) Diagram (Conceptual Model):</text:span></text:span><text:span text:style-name="T36"><text:line-break/></text:span><text:span text:style-name="Emphasis"><text:span text:style-name="T36">(An ER diagram would be inserted here. Core entities:</text:span></text:span></text:p>
      <text:list text:style-name="L22">
        <text:list-item>
          <text:p text:style-name="P74"><text:span text:style-name="Strong_20_Emphasis"><text:span text:style-name="T36">USER</text:span></text:span><text:span text:style-name="T36"> (UserID PK, Name, Bio, PhotoURL)</text:span></text:p>
        </text:list-item>
        <text:list-item>
          <text:p text:style-name="P74"><text:span text:style-name="Strong_20_Emphasis"><text:span text:style-name="T36">EVENT</text:span></text:span><text:span text:style-name="T36"> (EventID PK, Title, DateTime, CreatorID FK)</text:span></text:p>
        </text:list-item>
        <text:list-item>
          <text:p text:style-name="P74"><text:span text:style-name="Strong_20_Emphasis"><text:span text:style-name="T36">PARTICIPATION</text:span></text:span><text:span text:style-name="T36"> (Relationship linking USER and EVENT, with attribute: JoinTime)</text:span></text:p>
        </text:list-item>
        <text:list-item>
          <text:p text:style-name="P74"><text:span text:style-name="Strong_20_Emphasis"><text:span text:style-name="T36">CHAT_MESSAGE</text:span></text:span><text:span text:style-name="T36"> (MessageID PK, EventID FK, SenderID FK, Text, Timestamp)*</text:span></text:p>
          <text:p text:style-name="P74"><text:span text:style-name="Emphasis"><text:span text:style-name="T36">Relationships: A USER Creates one-to-many EVENTS. A USER Participates in many EVENTS. An EVENT has many CHAT_MESSAGES.)</text:span></text:span></text:p>
        </text:list-item>
      </text:list>
      <text:h text:style-name="P40" text:outline-level="2"><text:bookmark-start text:name="__RefHeading___Toc5028_3375418934"/><draw:frame draw:style-name="fr1" draw:name="Image2" text:anchor-type="char" svg:width="5.7701in" svg:height="4.1508in" draw:z-index="2"><draw:image xlink:href="Pictures/10000000000006400000047FEB7342F5.jpg" xlink:type="simple" xlink:show="embed" xlink:actuate="onLoad" draw:mime-type="image/jpeg"/></draw:frame>Diagram. 1<text:bookmark-end text:name="__RefHeading___Toc5028_3375418934"/></text:h>
      <text:h text:style-name="P40" text:outline-level="2"><text:bookmark-start text:name="__RefHeading___Toc5030_3375418934"/><draw:frame draw:style-name="fr1" draw:name="Image4" text:anchor-type="char" svg:width="5.7701in" svg:height="8.6547in" draw:z-index="3"><draw:image xlink:href="Pictures/100000000000040000000600F9AA1698.png" xlink:type="simple" xlink:show="embed" xlink:actuate="onLoad" draw:mime-type="image/png"/></draw:frame>Diagram. 2<text:bookmark-end text:name="__RefHeading___Toc5030_3375418934"/></text:h>
      <text:h text:style-name="P40" text:outline-level="2"><text:bookmark-start text:name="__RefHeading___Toc5032_3375418934"/><draw:frame draw:style-name="fr1" draw:name="Image3" text:anchor-type="char" svg:width="5.7701in" svg:height="3.8465in" draw:z-index="1"><draw:image xlink:href="Pictures/1000000000000600000004004A432D7E.png" xlink:type="simple" xlink:show="embed" xlink:actuate="onLoad" draw:mime-type="image/png"/></draw:frame>Diagram. 3<text:bookmark-end text:name="__RefHeading___Toc5032_3375418934"/></text:h>
      <text:h text:style-name="P36" text:outline-level="1"><text:bookmark-start text:name="__RefHeading___Toc3729_1729350629"/><text:span text:style-name="Strong_20_Emphasis"><text:span text:style-name="T54">CHAPTER 4: SYSTEM CODE GENERATION AND TESTING</text:span></text:span><text:bookmark-end text:name="__RefHeading___Toc3729_1729350629"/></text:h>
      <text:h text:style-name="P41" text:outline-level="2"><text:bookmark-start text:name="__RefHeading___Toc3731_1729350629"/><text:span text:style-name="Strong_20_Emphasis"><text:span text:style-name="T60">4.1 System Code Generation</text:span></text:span><text:bookmark-end text:name="__RefHeading___Toc3731_1729350629"/></text:h>
      <text:p text:style-name="P21"><text:span text:style-name="T60">The system was developed using a </text:span><text:span text:style-name="Strong_20_Emphasis"><text:span text:style-name="T60">modern full-stack architecture</text:span></text:span><text:span text:style-name="T60"> consisting of:</text:span></text:p>
      <text:list text:style-name="L23">
        <text:list-item>
          <text:p text:style-name="P79"><text:span text:style-name="Strong_20_Emphasis"><text:span text:style-name="T60">Frontend:</text:span></text:span><text:span text:style-name="T60"> React Native (Expo) </text:span></text:p>
        </text:list-item>
        <text:list-item>
          <text:p text:style-name="P79"><text:span text:style-name="Strong_20_Emphasis"><text:span text:style-name="T60">Backend:</text:span></text:span><text:span text:style-name="T60"> Node.js with Express.js </text:span></text:p>
        </text:list-item>
        <text:list-item>
          <text:p text:style-name="P79"><text:span text:style-name="Strong_20_Emphasis"><text:span text:style-name="T60">Database:</text:span></text:span><text:span text:style-name="T60"> MongoDB </text:span></text:p>
        </text:list-item>
        <text:list-item>
          <text:p text:style-name="P80"><text:span text:style-name="Strong_20_Emphasis"><text:span text:style-name="T60">Image Storage:</text:span></text:span><text:span text:style-name="T60"> Cloudinary </text:span></text:p>
        </text:list-item>
      </text:list>
      <text:h text:style-name="P46" text:outline-level="3" text:is-list-header="true"><text:bookmark-start text:name="__RefHeading___Toc3733_1729350629"/><text:span text:style-name="Strong_20_Emphasis"><text:span text:style-name="T60">4.1.1 Frontend Development</text:span></text:span><text:bookmark-end text:name="__RefHeading___Toc3733_1729350629"/></text:h>
      <text:p text:style-name="P115">The frontend was implemented using React Native to create a mobile-friendly user interface. Key features developed include:</text:p>
      <text:list text:style-name="L24">
        <text:list-item>
          <text:p text:style-name="P116">User authentication screens (Login/Register/Forgot Password) </text:p>
        </text:list-item>
        <text:list-item>
          <text:p text:style-name="P116">Swipe-based Explore screen (Tinder-style matching) </text:p>
        </text:list-item>
        <text:list-item>
          <text:p text:style-name="P116">Profile management (upload/delete photos, edit profile) </text:p>
        </text:list-item>
        <text:list-item>
          <text:p text:style-name="P117">Matches screen with navigation to user profiles </text:p>
        </text:list-item>
      </text:list>
      <text:p text:style-name="P115">Reusable components and hooks were used to ensure maintainability and scalability.</text:p>
      <text:p text:style-name="P27"/>
      <text:h text:style-name="P46" text:outline-level="3"><text:bookmark-start text:name="__RefHeading___Toc3735_1729350629"/><text:span text:style-name="Strong_20_Emphasis"><text:span text:style-name="T60">4.1.2 Backend Development</text:span></text:span><text:bookmark-end text:name="__RefHeading___Toc3735_1729350629"/></text:h>
      <text:p text:style-name="P115">The backend was developed using Node.js and Express.js to handle:</text:p>
      <text:list text:style-name="L25">
        <text:list-item>
          <text:p text:style-name="P118">User authentication and authorization </text:p>
        </text:list-item>
        <text:list-item>
          <text:p text:style-name="P118">API endpoints for matches, likes, and profiles </text:p>
        </text:list-item>
        <text:list-item>
          <text:p text:style-name="P118">Image upload handling via Cloudinary </text:p>
        </text:list-item>
        <text:list-item>
          <text:p text:style-name="P119">Data validation and error handling </text:p>
        </text:list-item>
      </text:list>
      <text:p text:style-name="P115">RESTful APIs were implemented to ensure smooth communication between frontend and backend.</text:p>
      <text:p text:style-name="P27"/>
      <text:h text:style-name="P46" text:outline-level="3"><text:bookmark-start text:name="__RefHeading___Toc3737_1729350629"/><text:soft-page-break/><text:span text:style-name="Strong_20_Emphasis"><text:span text:style-name="T60">4.1.3 Database Design</text:span></text:span><text:bookmark-end text:name="__RefHeading___Toc3737_1729350629"/></text:h>
      <text:p text:style-name="P115">MongoDB was used as a NoSQL database to store:</text:p>
      <text:list text:style-name="L26">
        <text:list-item>
          <text:p text:style-name="P120">User profiles (name, age, bio, interests) </text:p>
        </text:list-item>
        <text:list-item>
          <text:p text:style-name="P120">Matches and likes </text:p>
        </text:list-item>
        <text:list-item>
          <text:p text:style-name="P121">Uploaded image URLs </text:p>
        </text:list-item>
      </text:list>
      <text:p text:style-name="P115">Schemas were designed using Mongoose to enforce structure and relationships.</text:p>
      <text:p text:style-name="P27"/>
      <text:h text:style-name="P46" text:outline-level="3"><text:bookmark-start text:name="__RefHeading___Toc3739_1729350629"/><text:span text:style-name="Strong_20_Emphasis"><text:span text:style-name="T60">4.1.4 Code Quality and Version Control</text:span></text:span><text:bookmark-end text:name="__RefHeading___Toc3739_1729350629"/></text:h>
      <text:list text:style-name="L27">
        <text:list-item>
          <text:p text:style-name="P122">Git was used for version control </text:p>
        </text:list-item>
        <text:list-item>
          <text:p text:style-name="P122">Code was modularized into controllers, routes, and models </text:p>
        </text:list-item>
        <text:list-item>
          <text:p text:style-name="P122">Proper error handling and logging were implemented </text:p>
        </text:list-item>
        <text:list-item>
          <text:p text:style-name="P123">Environment variables were used for sensitive data </text:p>
        </text:list-item>
      </text:list>
      <text:p text:style-name="P27"/>
      <text:h text:style-name="P41" text:outline-level="2"><text:bookmark-start text:name="__RefHeading___Toc3741_1729350629"/><text:span text:style-name="Strong_20_Emphasis"><text:span text:style-name="T60">4.2 System Testing</text:span></text:span><text:bookmark-end text:name="__RefHeading___Toc3741_1729350629"/></text:h>
      <text:p text:style-name="P115">Testing was conducted to ensure the system is functional, secure, and user-friendly.</text:p>
      <text:p text:style-name="P27"/>
      <text:h text:style-name="P46" text:outline-level="3"><text:bookmark-start text:name="__RefHeading___Toc3743_1729350629"/><text:span text:style-name="Strong_20_Emphasis"><text:span text:style-name="T60">4.2.1 GUI Testing</text:span></text:span><text:bookmark-end text:name="__RefHeading___Toc3743_1729350629"/></text:h>
      <text:p text:style-name="P115">All user interface components were tested, including:</text:p>
      <text:list text:style-name="L28">
        <text:list-item>
          <text:p text:style-name="P124">Buttons (like, dislike, match navigation) </text:p>
        </text:list-item>
        <text:list-item>
          <text:p text:style-name="P124">Forms (login, signup, profile update) </text:p>
        </text:list-item>
        <text:list-item>
          <text:p text:style-name="P125">Image uploads and display </text:p>
        </text:list-item>
      </text:list>
      <text:p text:style-name="P27"/>
      <text:h text:style-name="P46" text:outline-level="3"><text:bookmark-start text:name="__RefHeading___Toc3745_1729350629"/><text:span text:style-name="Strong_20_Emphasis"><text:span text:style-name="T60">4.2.2 Usability Testing</text:span></text:span><text:bookmark-end text:name="__RefHeading___Toc3745_1729350629"/></text:h>
      <text:p text:style-name="P115">Users tested the app to ensure:</text:p>
      <text:list text:style-name="L29">
        <text:list-item>
          <text:p text:style-name="P126">Easy navigation between screens </text:p>
        </text:list-item>
        <text:list-item>
          <text:p text:style-name="P126"><text:soft-page-break/>Clear layout and readable text </text:p>
        </text:list-item>
        <text:list-item>
          <text:p text:style-name="P127">Smooth swipe interactions </text:p>
        </text:list-item>
      </text:list>
      <text:p text:style-name="P115">Feedback was used to improve the design.</text:p>
      <text:p text:style-name="P27"/>
      <text:h text:style-name="P46" text:outline-level="3"><text:bookmark-start text:name="__RefHeading___Toc3747_1729350629"/><text:span text:style-name="Strong_20_Emphasis"><text:span text:style-name="T60">4.2.3 Performance Testing</text:span></text:span><text:bookmark-end text:name="__RefHeading___Toc3747_1729350629"/></text:h>
      <text:p text:style-name="P115">The system was tested for:</text:p>
      <text:list text:style-name="L30">
        <text:list-item>
          <text:p text:style-name="P128">Fast loading of profiles and images </text:p>
        </text:list-item>
        <text:list-item>
          <text:p text:style-name="P128">Smooth swipe animations </text:p>
        </text:list-item>
        <text:list-item>
          <text:p text:style-name="P129">Efficient API response time </text:p>
        </text:list-item>
      </text:list>
      <text:p text:style-name="P27"/>
      <text:h text:style-name="P46" text:outline-level="3"><text:bookmark-start text:name="__RefHeading___Toc3749_1729350629"/><text:span text:style-name="Strong_20_Emphasis"><text:span text:style-name="T60">4.2.4 White Box Testing</text:span></text:span><text:bookmark-end text:name="__RefHeading___Toc3749_1729350629"/></text:h>
      <text:p text:style-name="P115">Internal logic was tested, including:</text:p>
      <text:list text:style-name="L31">
        <text:list-item>
          <text:p text:style-name="P130">Matching algorithm </text:p>
        </text:list-item>
        <text:list-item>
          <text:p text:style-name="P130">Like/dislike conditions </text:p>
        </text:list-item>
        <text:list-item>
          <text:p text:style-name="P131">Authentication logic </text:p>
        </text:list-item>
      </text:list>
      <text:p text:style-name="P27"/>
      <text:h text:style-name="P46" text:outline-level="3"><text:bookmark-start text:name="__RefHeading___Toc3751_1729350629"/><text:span text:style-name="Strong_20_Emphasis"><text:span text:style-name="T60">4.2.5 Load Testing</text:span></text:span><text:bookmark-end text:name="__RefHeading___Toc3751_1729350629"/></text:h>
      <text:p text:style-name="P115">Simulated multiple users accessing the system to evaluate:</text:p>
      <text:list text:style-name="L32">
        <text:list-item>
          <text:p text:style-name="P132">Server response under load </text:p>
        </text:list-item>
        <text:list-item>
          <text:p text:style-name="P133">Database performance </text:p>
        </text:list-item>
      </text:list>
      <text:p text:style-name="P27"/>
      <text:h text:style-name="P46" text:outline-level="3"><text:bookmark-start text:name="__RefHeading___Toc3753_1729350629"/><text:span text:style-name="Strong_20_Emphasis"><text:span text:style-name="T60">4.2.6 Regression Testing</text:span></text:span><text:bookmark-end text:name="__RefHeading___Toc3753_1729350629"/></text:h>
      <text:p text:style-name="P115">After updates (e.g., adding profile photo upload), tests ensured:</text:p>
      <text:list text:style-name="L33">
        <text:list-item>
          <text:p text:style-name="P134">Existing features (login, matching) still worked </text:p>
        </text:list-item>
        <text:list-item>
          <text:p text:style-name="P135">No new bugs were introduced </text:p>
        </text:list-item>
      </text:list>
      <text:p text:style-name="P27"><text:soft-page-break/></text:p>
      <text:h text:style-name="P46" text:outline-level="3"><text:bookmark-start text:name="__RefHeading___Toc3755_1729350629"/><text:span text:style-name="Strong_20_Emphasis"><text:span text:style-name="T60">4.2.7 Stress Testing</text:span></text:span><text:bookmark-end text:name="__RefHeading___Toc3755_1729350629"/></text:h>
      <text:p text:style-name="P115">The system was tested under extreme conditions such as:</text:p>
      <text:list text:style-name="L34">
        <text:list-item>
          <text:p text:style-name="P136">Large number of image uploads </text:p>
        </text:list-item>
        <text:list-item>
          <text:p text:style-name="P137">High number of concurrent users </text:p>
        </text:list-item>
      </text:list>
      <text:p text:style-name="P27"/>
      <text:h text:style-name="P46" text:outline-level="3"><text:bookmark-start text:name="__RefHeading___Toc3757_1729350629"/><text:span text:style-name="Strong_20_Emphasis"><text:span text:style-name="T60">4.2.8 Smoke Testing</text:span></text:span><text:bookmark-end text:name="__RefHeading___Toc3757_1729350629"/></text:h>
      <text:p text:style-name="P115">Basic functionality tested after each build:</text:p>
      <text:list text:style-name="L35">
        <text:list-item>
          <text:p text:style-name="P138">App launches successfully </text:p>
        </text:list-item>
        <text:list-item>
          <text:p text:style-name="P138">User can log in </text:p>
        </text:list-item>
        <text:list-item>
          <text:p text:style-name="P139">API connects properly </text:p>
        </text:list-item>
      </text:list>
      <text:p text:style-name="P27"/>
      <text:h text:style-name="P46" text:outline-level="3"><text:bookmark-start text:name="__RefHeading___Toc3759_1729350629"/><text:span text:style-name="Strong_20_Emphasis"><text:span text:style-name="T60">4.2.9 Unit Testing</text:span></text:span><text:bookmark-end text:name="__RefHeading___Toc3759_1729350629"/></text:h>
      <text:p text:style-name="P115">Individual components tested:</text:p>
      <text:list text:style-name="L36">
        <text:list-item>
          <text:p text:style-name="P140">API routes </text:p>
        </text:list-item>
        <text:list-item>
          <text:p text:style-name="P140">Controllers </text:p>
        </text:list-item>
        <text:list-item>
          <text:p text:style-name="P141">React components </text:p>
        </text:list-item>
      </text:list>
      <text:p text:style-name="P27"/>
      <text:h text:style-name="P46" text:outline-level="3"><text:bookmark-start text:name="__RefHeading___Toc3761_1729350629"/><text:span text:style-name="Strong_20_Emphasis"><text:span text:style-name="T60">4.2.10 Acceptance Testing</text:span></text:span><text:bookmark-end text:name="__RefHeading___Toc3761_1729350629"/></text:h>
      <text:p text:style-name="P115">The system was tested against project requirements:</text:p>
      <text:list text:style-name="L37">
        <text:list-item>
          <text:p text:style-name="P142">Users can register and log in </text:p>
        </text:list-item>
        <text:list-item>
          <text:p text:style-name="P142">Users can swipe and match </text:p>
        </text:list-item>
        <text:list-item>
          <text:p text:style-name="P143">Users can upload and manage profiles </text:p>
        </text:list-item>
      </text:list>
      <text:p text:style-name="P27"/>
      <text:h text:style-name="P46" text:outline-level="3"><text:bookmark-start text:name="__RefHeading___Toc3763_1729350629"/><text:soft-page-break/><text:span text:style-name="Strong_20_Emphasis"><text:span text:style-name="T60">4.2.11 Black Box Testing</text:span></text:span><text:bookmark-end text:name="__RefHeading___Toc3763_1729350629"/></text:h>
      <text:p text:style-name="P115">Testers interacted with the system without seeing the code to verify:</text:p>
      <text:list text:style-name="L38">
        <text:list-item>
          <text:p text:style-name="P144">Correct outputs for given inputs </text:p>
        </text:list-item>
        <text:list-item>
          <text:p text:style-name="P145">Functional user experience </text:p>
        </text:list-item>
      </text:list>
      <text:p text:style-name="P27"/>
      <text:h text:style-name="P46" text:outline-level="3"><text:bookmark-start text:name="__RefHeading___Toc3765_1729350629"/><text:span text:style-name="Strong_20_Emphasis"><text:span text:style-name="T60">4.2.12 Functional Testing</text:span></text:span><text:bookmark-end text:name="__RefHeading___Toc3765_1729350629"/></text:h>
      <text:p text:style-name="P115">Ensured all features work as intended:</text:p>
      <text:list text:style-name="L39">
        <text:list-item>
          <text:p text:style-name="P146">Matching system </text:p>
        </text:list-item>
        <text:list-item>
          <text:p text:style-name="P146">Profile updates </text:p>
        </text:list-item>
        <text:list-item>
          <text:p text:style-name="P147">Messaging/navigation </text:p>
        </text:list-item>
      </text:list>
      <text:p text:style-name="P27"/>
      <text:h text:style-name="P46" text:outline-level="3"><text:bookmark-start text:name="__RefHeading___Toc3767_1729350629"/><text:span text:style-name="Strong_20_Emphasis"><text:span text:style-name="T60">4.2.13 Integration Testing</text:span></text:span><text:bookmark-end text:name="__RefHeading___Toc3767_1729350629"/></text:h>
      <text:p text:style-name="P115">Tested communication between:</text:p>
      <text:list text:style-name="L40">
        <text:list-item>
          <text:p text:style-name="P148">Frontend and backend APIs </text:p>
        </text:list-item>
        <text:list-item>
          <text:p text:style-name="P148">Backend and database </text:p>
        </text:list-item>
        <text:list-item>
          <text:p text:style-name="P149">Cloudinary and server </text:p>
        </text:list-item>
      </text:list>
      <text:p text:style-name="P27"/>
      <text:h text:style-name="P46" text:outline-level="3"><text:bookmark-start text:name="__RefHeading___Toc3769_1729350629"/><text:span text:style-name="Strong_20_Emphasis"><text:span text:style-name="T60">4.2.14 Security Testing</text:span></text:span><text:bookmark-end text:name="__RefHeading___Toc3769_1729350629"/></text:h>
      <text:p text:style-name="P115">Ensured system security by:</text:p>
      <text:list text:style-name="L41">
        <text:list-item>
          <text:p text:style-name="P150">Hashing passwords </text:p>
        </text:list-item>
        <text:list-item>
          <text:p text:style-name="P150">Validating user inputs </text:p>
        </text:list-item>
        <text:list-item>
          <text:p text:style-name="P151">Preventing unauthorized access </text:p>
        </text:list-item>
      </text:list>
      <text:p text:style-name="P27"/>
      <text:h text:style-name="P46" text:outline-level="3"><text:bookmark-start text:name="__RefHeading___Toc3771_1729350629"/><text:span text:style-name="Strong_20_Emphasis"><text:span text:style-name="T60">4.2.15 Portability/Compatibility Testing</text:span></text:span><text:bookmark-end text:name="__RefHeading___Toc3771_1729350629"/></text:h>
      <text:p text:style-name="P115">Tested app on:</text:p>
      <text:list text:style-name="L42">
        <text:list-item>
          <text:p text:style-name="P152"><text:soft-page-break/>Different Android devices </text:p>
        </text:list-item>
        <text:list-item>
          <text:p text:style-name="P152">Various screen sizes </text:p>
        </text:list-item>
        <text:list-item>
          <text:p text:style-name="P153">Different network conditions </text:p>
        </text:list-item>
      </text:list>
      <text:p text:style-name="P27"/>
      <text:h text:style-name="P37" text:outline-level="1"><text:bookmark-start text:name="__RefHeading___Toc3773_1729350629"/><text:span text:style-name="Strong_20_Emphasis"><text:span text:style-name="T60">CHAPTER 5: CONCLUSIONS AND RECOMMENDATIONS</text:span></text:span><text:bookmark-end text:name="__RefHeading___Toc3773_1729350629"/></text:h>
      <text:h text:style-name="P41" text:outline-level="2"><text:bookmark-start text:name="__RefHeading___Toc3775_1729350629"/><text:span text:style-name="Strong_20_Emphasis"><text:span text:style-name="T60">5.1 Conclusions</text:span></text:span><text:bookmark-end text:name="__RefHeading___Toc3775_1729350629"/></text:h>
      <text:p text:style-name="P115">The dating application was successfully designed and implemented using modern technologies. The system achieved its objectives by providing:</text:p>
      <text:list text:style-name="L43">
        <text:list-item>
          <text:p text:style-name="P154">A smooth and interactive user experience </text:p>
        </text:list-item>
        <text:list-item>
          <text:p text:style-name="P154">Efficient matching functionality </text:p>
        </text:list-item>
        <text:list-item>
          <text:p text:style-name="P155">Secure user authentication and data handling </text:p>
        </text:list-item>
      </text:list>
      <text:p text:style-name="P115">Testing confirmed that the system is reliable, scalable, and performs well under normal and high usage conditions.</text:p>
      <text:p text:style-name="P27"/>
      <text:h text:style-name="P41" text:outline-level="2"><text:bookmark-start text:name="__RefHeading___Toc3777_1729350629"/><text:span text:style-name="Strong_20_Emphasis"><text:span text:style-name="T60">5.2 Recommendations</text:span></text:span><text:bookmark-end text:name="__RefHeading___Toc3777_1729350629"/></text:h>
      <text:p text:style-name="P115">To improve the system further, the following recommendations are proposed:</text:p>
      <text:h text:style-name="P46" text:outline-level="3"><text:bookmark-start text:name="__RefHeading___Toc3779_1729350629"/><text:span text:style-name="Strong_20_Emphasis"><text:span text:style-name="T60">1. Add Real-Time Messaging</text:span></text:span><text:bookmark-end text:name="__RefHeading___Toc3779_1729350629"/></text:h>
      <text:p text:style-name="P115">Integrate WebSockets (e.g., Socket.io) for live chat between matched users.</text:p>
      <text:h text:style-name="P46" text:outline-level="3"><text:bookmark-start text:name="__RefHeading___Toc3781_1729350629"/><text:span text:style-name="Strong_20_Emphasis"><text:span text:style-name="T60">2. Improve Matching Algorithm</text:span></text:span><text:bookmark-end text:name="__RefHeading___Toc3781_1729350629"/></text:h>
      <text:p text:style-name="P115">Incorporate AI-based recommendations based on:</text:p>
      <text:list text:style-name="L44">
        <text:list-item>
          <text:p text:style-name="P156">User preferences </text:p>
        </text:list-item>
        <text:list-item>
          <text:p text:style-name="P157">Behavior and interactions </text:p>
        </text:list-item>
      </text:list>
      <text:h text:style-name="P46" text:outline-level="3" text:is-list-header="true"><text:bookmark-start text:name="__RefHeading___Toc3783_1729350629"/><text:soft-page-break/><text:span text:style-name="Strong_20_Emphasis"><text:span text:style-name="T60">3. Enhance Security</text:span></text:span><text:bookmark-end text:name="__RefHeading___Toc3783_1729350629"/></text:h>
      <text:list text:style-name="L45">
        <text:list-item>
          <text:p text:style-name="P158">Add two-factor authentication (2FA) </text:p>
        </text:list-item>
        <text:list-item>
          <text:p text:style-name="P159">Implement JWT refresh tokens </text:p>
        </text:list-item>
      </text:list>
      <text:h text:style-name="P46" text:outline-level="3" text:is-list-header="true"><text:bookmark-start text:name="__RefHeading___Toc3785_1729350629"/><text:span text:style-name="Strong_20_Emphasis"><text:span text:style-name="T60">4. Performance Optimization</text:span></text:span><text:bookmark-end text:name="__RefHeading___Toc3785_1729350629"/></text:h>
      <text:list text:style-name="L46">
        <text:list-item>
          <text:p text:style-name="P160">Cache frequently accessed data </text:p>
        </text:list-item>
        <text:list-item>
          <text:p text:style-name="P161">Optimize image loading </text:p>
        </text:list-item>
      </text:list>
      <text:h text:style-name="P46" text:outline-level="3" text:is-list-header="true"><text:bookmark-start text:name="__RefHeading___Toc3787_1729350629"/><text:span text:style-name="Strong_20_Emphasis"><text:span text:style-name="T60">5. Cross-Platform Expansion</text:span></text:span><text:bookmark-end text:name="__RefHeading___Toc3787_1729350629"/></text:h>
      <text:p text:style-name="P115">Extend the application to:</text:p>
      <text:list text:style-name="L47">
        <text:list-item>
          <text:p text:style-name="P162"><text:soft-page-break/>iOS devices </text:p>
        </text:list-item>
        <text:list-item>
          <text:p text:style-name="P163">Web platform </text:p>
        </text:list-item>
      </text:list>
      <text:p text:style-name="P27"/>
      <text:h text:style-name="P37" text:outline-level="1"><text:bookmark-start text:name="__RefHeading___Toc3789_1729350629"/><text:span text:style-name="Strong_20_Emphasis"><text:span text:style-name="T60">REFERENCES</text:span></text:span><text:bookmark-end text:name="__RefHeading___Toc3789_1729350629"/></text:h>
      <text:list text:style-name="L48">
        <text:list-item>
          <text:p text:style-name="P81"><text:span text:style-name="T60">React Native Documentation – </text:span><text:a xlink:type="simple" xlink:href="https://reactnative.dev/" office:target-frame-name="_new" xlink:show="replace" text:style-name="Internet_20_link" text:visited-style-name="Visited_20_Internet_20_Link"><text:span text:style-name="T60">https://reactnative.dev</text:span></text:a><text:span text:style-name="T60"> </text:span></text:p>
        </text:list-item>
        <text:list-item>
          <text:p text:style-name="P81"><text:span text:style-name="T60">Node.js Documentation – </text:span><text:a xlink:type="simple" xlink:href="https://nodejs.org/" office:target-frame-name="_new" xlink:show="replace" text:style-name="Internet_20_link" text:visited-style-name="Visited_20_Internet_20_Link"><text:span text:style-name="T60">https://nodejs.org</text:span></text:a><text:span text:style-name="T60"> </text:span></text:p>
        </text:list-item>
        <text:list-item>
          <text:p text:style-name="P164">MongoDB Documentation – https://mongodb.com </text:p>
        </text:list-item>
        <text:list-item>
          <text:p text:style-name="P82"><text:span text:style-name="T60">Cloudinary Documentation – </text:span><text:a xlink:type="simple" xlink:href="https://cloudinary.com/" office:target-frame-name="_new" xlink:show="replace" text:style-name="Internet_20_link" text:visited-style-name="Visited_20_Internet_20_Link"><text:span text:style-name="T60">https://cloudinary.com</text:span></text:a><text:span text:style-name="T60"> </text:span></text:p>
        </text:list-item>
        <text:list-item>
          <text:p text:style-name="P75"><text:span text:style-name="T13">Asch, S.E. (1946) ‘Forming impressions of personality’, </text:span><text:span text:style-name="Emphasis"><text:span text:style-name="T13">Journal of Abnormal and Social Psychology</text:span></text:span><text:span text:style-name="T13">, 41, pp. 258–290.</text:span></text:p>
        </text:list-item>
        <text:list-item>
          <text:p text:style-name="P75"><text:span text:style-name="T24">D’Angelo, J.D. and Toma, C.L. (2016) ‘There are plenty of fish in the sea: The effects of choice overload and reversibility on online daters’ satisfaction with selected partners’, </text:span><text:span text:style-name="Emphasis"><text:span text:style-name="T24">Media Psychology</text:span></text:span><text:span text:style-name="T24">, 20(1), pp. 1–27.</text:span></text:p>
        </text:list-item>
        <text:list-item>
          <text:p text:style-name="P75"><text:span text:style-name="T24">Hancock, J.T. and Toma, C.L. (2009) ‘Putting your best face forward: The accuracy of online dating photographs’, </text:span><text:span text:style-name="Emphasis"><text:span text:style-name="T24">Journal of Communication</text:span></text:span><text:span text:style-name="T24">, 59(2), pp. 367–386.</text:span></text:p>
        </text:list-item>
        <text:list-item>
          <text:p text:style-name="P75"><text:span text:style-name="T24">Heino, R.D., Ellison, N.B. and Gibbs, J.L. (2010) ‘Relationshopping: Investigating the market metaphor in online dating’, </text:span><text:span text:style-name="Emphasis"><text:span text:style-name="T24">Journal of Social and Personal Relationships</text:span></text:span><text:span text:style-name="T24">, 27(4), pp. 427–447.</text:span></text:p>
        </text:list-item>
        <text:list-item>
          <text:p text:style-name="P75"><text:span text:style-name="T24">Lenton, A.P., Fasolo, B. and Todd, P.M. (2008) ‘“Shopping” for a mate: Expected versus experienced preferences in online mate choice’, </text:span><text:span text:style-name="Emphasis"><text:span text:style-name="T24">IEEE Transactions on Professional Communication</text:span></text:span><text:span text:style-name="T24">, 51(2), pp. 169–182.</text:span></text:p>
        </text:list-item>
        <text:list-item>
          <text:p text:style-name="P75"><text:span text:style-name="T24">Ranzini, G. and Lutz, C. (2016) ‘Love at first swipe? Explaining Tinder self-presentation and motives’, </text:span><text:span text:style-name="Emphasis"><text:span text:style-name="T24">Mobile Media &amp; Communication</text:span></text:span><text:span text:style-name="T24">, 5(1), pp. 80–101.</text:span></text:p>
        </text:list-item>
        <text:list-item>
          <text:p text:style-name="P75"><text:soft-page-break/><text:span text:style-name="T24">Rosenfeld, M.J., Thomas, R.J. and Hausen, S. (2019) </text:span><text:span text:style-name="Emphasis"><text:span text:style-name="T24">Disintermediating your friends: How online dating in the United States displaces other ways of meeting</text:span></text:span><text:span text:style-name="T24">. Available at: </text:span><text:a xlink:type="simple" xlink:href="https://osf.io/preprints/socarxiv/f6c4p/" office:target-frame-name="_blank" xlink:show="new" text:style-name="Internet_20_link" text:visited-style-name="Visited_20_Internet_20_Link"><text:span text:style-name="T1">https://osf.io/preprints/socarxiv/f6c4p/</text:span></text:a><text:span text:style-name="T24"> (Accessed: 15 March 2024).</text:span></text:p>
        </text:list-item>
        <text:list-item>
          <text:p text:style-name="P75"><text:span text:style-name="T24">Schüll, N.D. (2014) </text:span><text:span text:style-name="Emphasis"><text:span text:style-name="T24">Addiction by design: Machine gambling in Las Vegas</text:span></text:span><text:span text:style-name="T24">. Princeton: Princeton University Press.</text:span></text:p>
        </text:list-item>
        <text:list-item>
          <text:p text:style-name="P75"><text:span text:style-name="T24">Schwartz, B. (2004) </text:span><text:span text:style-name="Emphasis"><text:span text:style-name="T24">The paradox of choice: Why more is less</text:span></text:span><text:span text:style-name="T24">. New York: Ecco.</text:span></text:p>
        </text:list-item>
        <text:list-item>
          <text:p text:style-name="P75"><text:span text:style-name="T24">Sharabi, L.L. and Timmerman, L. (2020) ‘Social Information Processing Theory’, in Van den Bulck, J. (ed.) </text:span><text:span text:style-name="Emphasis"><text:span text:style-name="T24">The international encyclopedia of media psychology</text:span></text:span><text:span text:style-name="T24">. Hoboken: Wiley Blackwell.</text:span></text:p>
        </text:list-item>
        <text:list-item>
          <text:p text:style-name="P75"><text:span text:style-name="T24">Strubel, J. and Petrie, T.A. (2020) ‘Love me Tinder: Body image and psychosocial functioning among men and women’, </text:span><text:span text:style-name="Emphasis"><text:span text:style-name="T24">Body Image</text:span></text:span><text:span text:style-name="T24">, 34, pp. 259–269.</text:span></text:p>
        </text:list-item>
        <text:list-item>
          <text:p text:style-name="P75"><text:span text:style-name="T24">Timmerman, E. and Courtois, C. (2018) ‘From swiping to casual sex and/or committed relationships: Exploring the experiences of Tinder users’, </text:span><text:span text:style-name="Emphasis"><text:span text:style-name="T24">The Information Society</text:span></text:span><text:span text:style-name="T24">, 34(2), pp. 59–70.</text:span></text:p>
        </text:list-item>
        <text:list-item>
          <text:p text:style-name="P76"><text:span text:style-name="T24">Walther, J.B. (1992) ‘Interpersonal effects in computer-mediated interaction: A relational perspective’, </text:span><text:span text:style-name="Emphasis"><text:span text:style-name="T24">Communication Research</text:span></text:span><text:span text:style-name="T24">, 19(1), pp. 52–90.</text:span></text:p>
        </text:list-item>
      </text:list>
      <text:p text:style-name="P27"/>
      <text:h text:style-name="P37" text:outline-level="1"><text:bookmark-start text:name="__RefHeading___Toc3791_1729350629"/><text:soft-page-break/><text:span text:style-name="Strong_20_Emphasis"><text:span text:style-name="T60">APPENDICES</text:span></text:span><text:bookmark-end text:name="__RefHeading___Toc3791_1729350629"/></text:h>
      <text:h text:style-name="P41" text:outline-level="2"><text:bookmark-start text:name="__RefHeading___Toc3793_1729350629"/><text:span text:style-name="Strong_20_Emphasis"><text:span text:style-name="T60">Appendix A: Sample API Routes</text:span></text:span><text:bookmark-end text:name="__RefHeading___Toc3793_1729350629"/></text:h>
      <text:list text:style-name="L49">
        <text:list-item>
          <text:p text:style-name="P165">POST /register </text:p>
        </text:list-item>
        <text:list-item>
          <text:p text:style-name="P165">POST /login </text:p>
        </text:list-item>
        <text:list-item>
          <text:p text:style-name="P165">GET /matches </text:p>
        </text:list-item>
        <text:list-item>
          <text:p text:style-name="P166">POST /like </text:p>
        </text:list-item>
      </text:list>
      <text:h text:style-name="P41" text:outline-level="2" text:is-list-header="true"><text:bookmark-start text:name="__RefHeading___Toc3795_1729350629"/><text:span text:style-name="Strong_20_Emphasis"><text:span text:style-name="T60">Appendix B: Screenshots</text:span></text:span><text:bookmark-end text:name="__RefHeading___Toc3795_1729350629"/></text:h>
      <text:list text:style-name="L50">
        <text:list-item>
          <text:p text:style-name="P167">Login Screen </text:p>
        </text:list-item>
        <text:list-item>
          <text:p text:style-name="P167">Explore Screen (Swipe) </text:p>
        </text:list-item>
        <text:list-item>
          <text:p text:style-name="P167">Profile Screen </text:p>
        </text:list-item>
        <text:list-item>
          <text:p text:style-name="P168">Matches Screen </text:p>
        </text:list-item>
      </text:list>
      <text:h text:style-name="P41" text:outline-level="2" text:is-list-header="true"><text:bookmark-start text:name="__RefHeading___Toc3797_1729350629"/><text:span text:style-name="Strong_20_Emphasis"><text:span text:style-name="T60">Appendix C: Sample Code Snippet</text:span></text:span><text:bookmark-end text:name="__RefHeading___Toc3797_1729350629"/></text:h>
      <text:p text:style-name="P28">// Example: Like User</text:p>
      <text:p text:style-name="P29">router.post('/like', async (req, res) =&gt; {</text:p>
      <text:p text:style-name="P29"><text:s text:c="2"/>const { userId, likedUserId } = req.body;</text:p>
      <text:p text:style-name="P29"><text:s text:c="2"/>// logic to store like and check match</text:p>
      <text:p text:style-name="P30"><text:span text:style-name="Strong_20_Emphasis"><text:span text:style-name="T60">});</text:span></text:span></text:p>
      <text:p text:style-name="P113"><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Arial" svg:font-family="'Times New Roman/Arial'"/>
    <style:font-face style:name="Times New Roman1" svg:font-family="'Times New Roman'" style:font-adornments="Bold"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style-name="Bold" style:font-family-generic="roman"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1" fo:font-family="'Times New Roman'" style:font-style-name="Bold" style:font-family-generic="roman" fo:font-size="14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5.179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3764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573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46in" style:type="center"/>
          <style:tab-stop style:position="5.7701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PageNumWizard_FOOTER_Default Page Style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9:45:45.120957013</meta:creation-date>
    <dc:date>2026-04-28T10:15:27.794508931</dc:date>
    <meta:editing-duration>P1DT2H29M46S</meta:editing-duration>
    <meta:editing-cycles>87</meta:editing-cycles>
    <meta:generator>LibreOffice/24.2.7.2$Linux_X86_64 LibreOffice_project/420$Build-2</meta:generator>
    <meta:print-date>2026-04-28T10:11:47.562767221</meta:print-date>
    <meta:printed-by>PDF files</meta:printed-by>
    <meta:document-statistic meta:table-count="0" meta:image-count="4" meta:object-count="0" meta:page-count="43" meta:paragraph-count="455" meta:word-count="7862" meta:character-count="55197" meta:non-whitespace-character-count="47858"/>
  </office:meta>
</office:document-meta>
</file>